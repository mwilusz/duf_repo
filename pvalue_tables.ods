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42cm"/>
    </style:style>
    <style:style style:name="co5" style:family="table-column">
      <style:table-column-properties fo:break-before="auto" style:column-width="6.865cm"/>
    </style:style>
    <style:style style:name="co6" style:family="table-column">
      <style:table-column-properties fo:break-before="auto" style:column-width="6.532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6.04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3.438cm"/>
    </style:style>
    <style:style style:name="co11" style:family="table-column">
      <style:table-column-properties fo:break-before="auto" style:column-width="3.657cm"/>
    </style:style>
    <style:style style:name="co12" style:family="table-column">
      <style:table-column-properties fo:break-before="auto" style:column-width="5.075cm"/>
    </style:style>
    <style:style style:name="co13" style:family="table-column">
      <style:table-column-properties fo:break-before="auto" style:column-width="3.171cm"/>
    </style:style>
    <style:style style:name="co14" style:family="table-column">
      <style:table-column-properties fo:break-before="auto" style:column-width="3.614cm"/>
    </style:style>
    <style:style style:name="co15" style:family="table-column">
      <style:table-column-properties fo:break-before="auto" style:column-width="2.854cm"/>
    </style:style>
    <style:style style:name="co16" style:family="table-column">
      <style:table-column-properties fo:break-before="auto" style:column-width="4.766cm"/>
    </style:style>
    <style:style style:name="co17" style:family="table-column">
      <style:table-column-properties fo:break-before="auto" style:column-width="3.094cm"/>
    </style:style>
    <style:style style:name="co18" style:family="table-column">
      <style:table-column-properties fo:break-before="auto" style:column-width="4.6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ackground-color="#ffa6a6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ffa6a6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b4c7dc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ackground-color="#b4c7dc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b4c7dc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8" style:family="table-cell" style:parent-style-name="Default"/>
    <style:style style:name="ce19" style:family="table-cell" style:parent-style-name="Default">
      <style:table-cell-properties fo:border="0.74pt solid #000000"/>
      <style:map style:condition="cell-content()&lt;0.05" style:apply-style-name="Good" style:base-cell-address="combined_families.D1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combined_families.D2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combined_families.D2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combined_families.D2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/>
    <style:style style:name="ce29" style:family="table-cell" style:parent-style-name="Default">
      <style:table-cell-properties fo:border="0.74pt solid #000000"/>
      <style:map style:condition="cell-content()&lt;0.05" style:apply-style-name="Good" style:base-cell-address="separate_families_count.D1"/>
    </style:style>
    <style:style style:name="ce77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eparate_families_count.D1"/>
    </style:style>
    <style:style style:name="ce78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eparate_families_count.D1"/>
    </style:style>
    <style:style style:name="ce79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eparate_families_count.D1"/>
    </style:style>
    <style:style style:name="ce33" style:family="table-cell" style:parent-style-name="Default">
      <style:table-cell-properties fo:border-bottom="none" fo:background-color="#ffffa6" fo:border-left="0.74pt solid #000000" fo:border-right="0.74pt solid #000000" fo:border-top="0.74pt solid #666666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666666"/>
    </style:style>
    <style:style style:name="ce3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order-left="0.74pt solid #000000" fo:border-right="0.74pt solid #000000" fo:border-top="0.74pt solid #666666"/>
      <style:text-properties fo:font-weight="normal" style:font-weight-asian="normal" style:font-weight-complex="normal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="0.74pt solid #000000"/>
      <style:map style:condition="cell-content()&lt;0.05" style:apply-style-name="Good" style:base-cell-address="separate_families_mean.D1"/>
    </style:style>
    <style:style style:name="ce8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eparate_families_mean.D1"/>
    </style:style>
    <style:style style:name="ce90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eparate_families_mean.D1"/>
    </style:style>
    <style:style style:name="ce91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eparate_families_mean.D1"/>
    </style:style>
    <style:style style:name="ce45" style:family="table-cell" style:parent-style-name="Default">
      <style:table-cell-properties fo:border-bottom="none" fo:border-left="0.74pt solid #000000" fo:border-right="0.74pt solid #000000" fo:border-top="0.74pt solid #666666"/>
      <style:map style:condition="cell-content()&lt;0.05" style:apply-style-name="Good" style:base-cell-address="separate_families_mean.D1"/>
    </style:style>
    <style:style style:name="ce93" style:family="table-cell" style:parent-style-name="Default">
      <style:table-cell-properties fo:border="0.74pt solid #000000"/>
    </style:style>
    <style:style style:name="ce9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5" style:family="table-cell" style:parent-style-name="Default">
      <style:table-cell-properties fo:border-bottom="none" fo:border-left="0.74pt solid #000000" fo:border-right="0.74pt solid #000000" fo:border-top="none"/>
    </style:style>
    <style:style style:name="ce9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7" style:family="table-cell" style:parent-style-name="Default"/>
    <style:style style:name="ce98" style:family="table-cell" style:parent-style-name="Default">
      <style:table-cell-properties fo:border="0.74pt solid #000000"/>
      <style:map style:condition="cell-content()&lt;0.05" style:apply-style-name="Good" style:base-cell-address="separate_families_top_ic.D1"/>
    </style:style>
    <style:style style:name="ce9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eparate_families_top_ic.D1"/>
    </style:style>
    <style:style style:name="ce100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eparate_families_top_ic.D1"/>
    </style:style>
    <style:style style:name="ce101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eparate_families_top_ic.D1"/>
    </style:style>
    <style:style style:name="ce55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eparate_families_top_ic.D37"/>
    </style:style>
    <style:style style:name="ce104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105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07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transparent" fo:border="none"/>
    </style:style>
    <style:style style:name="ce6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61" style:family="table-cell" style:parent-style-name="Default">
      <style:table-cell-properties fo:border="0.74pt solid #000000"/>
      <style:map style:condition="cell-content()&lt;0.05" style:apply-style-name="Good" style:base-cell-address="summary_v1.D1"/>
    </style:style>
    <style:style style:name="ce62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ummary_v1.D2"/>
    </style:style>
    <style:style style:name="ce63" style:family="table-cell" style:parent-style-name="Default" style:data-style-name="N81">
      <style:table-cell-properties fo:border-bottom="none" fo:border-left="0.74pt solid #000000" fo:border-right="0.74pt solid #000000" fo:border-top="none"/>
      <style:map style:condition="cell-content()&lt;0.05" style:apply-style-name="Good" style:base-cell-address="summary_v1.D2"/>
    </style:style>
    <style:style style:name="ce64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ummary_v1.D2"/>
    </style:style>
    <style:style style:name="ce65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ummary_v1.D2"/>
    </style:style>
    <style:style style:name="ce1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6" style:family="table-cell" style:parent-style-name="Default">
      <style:table-cell-properties fo:border-bottom="none" fo:border-left="0.74pt solid #000000" fo:border-right="none" fo:border-top="0.74pt solid #000000"/>
    </style:style>
    <style:style style:name="ce117" style:family="table-cell" style:parent-style-name="Default">
      <style:table-cell-properties fo:border-bottom="none" fo:border-left="0.74pt solid #000000" fo:border-right="none" fo:border-top="none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0" style:family="table-cell" style:parent-style-name="Default">
      <style:table-cell-properties fo:border-bottom="none" fo:border-left="none" fo:border-right="0.74pt solid #000000" fo:border-top="0.74pt solid #000000"/>
    </style:style>
    <style:style style:name="ce121" style:family="table-cell" style:parent-style-name="Default">
      <style:table-cell-properties fo:border-bottom="none" fo:border-left="none" fo:border-right="0.74pt solid #000000" fo:border-top="none"/>
    </style:style>
    <style:style style:name="ce122" style:family="table-cell" style:parent-style-name="Default">
      <style:table-cell-properties fo:border-bottom="0.74pt solid #000000" fo:border-left="none" fo:border-right="0.74pt solid #000000" fo:border-top="none"/>
    </style:style>
    <style:style style:name="ce133" style:family="table-cell" style:parent-style-name="Default">
      <style:table-cell-properties fo:border="0.74pt solid #000000"/>
      <style:map style:condition="cell-content()&lt;0.05" style:apply-style-name="Good" style:base-cell-address="summary_v2.D2"/>
    </style:style>
    <style:style style:name="ce134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ummary_v2.D2"/>
    </style:style>
    <style:style style:name="ce135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ummary_v2.D2"/>
    </style:style>
    <style:style style:name="ce140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ummary_v2.D2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41" style:family="table-cell" style:parent-style-name="Default">
      <style:table-cell-properties fo:border="none"/>
    </style:style>
    <style:style style:name="ce149" style:family="table-cell" style:parent-style-name="Default">
      <style:table-cell-properties fo:border="0.74pt solid #000000"/>
      <style:map style:condition="cell-content()&lt;0.05" style:apply-style-name="Good" style:base-cell-address="summary_v3.D1"/>
    </style:style>
    <style:style style:name="ce150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ummary_v3.D1"/>
    </style:style>
    <style:style style:name="ce151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ummary_v3.D1"/>
    </style:style>
    <style:style style:name="ce152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ummary_v3.D1"/>
    </style:style>
    <style:style style:name="ce153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ummary_v3.D17"/>
    </style:style>
    <style:style style:name="ce154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ummary_v3.D17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none" fo:border-left="0.74pt solid #000000" fo:border-right="0.74pt solid #000000" fo:border-top="none"/>
      <style:map style:condition="cell-content()&lt;0.05" style:apply-style-name="Good" style:base-cell-address="summary_v6.D2"/>
    </style:style>
    <style:style style:name="ce15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.05" style:apply-style-name="Good" style:base-cell-address="summary_v6.D2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.05" style:apply-style-name="Good" style:base-cell-address="summary_v6.D2"/>
    </style:style>
    <style:style style:name="ce16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ombined_famil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14" office:value-type="string" calcext:value-type="string">
            <text:p>data_type</text:p>
          </table:table-cell>
          <table:table-cell table:style-name="ce19" office:value-type="string" calcext:value-type="string">
            <text:p>pvalue</text:p>
          </table:table-cell>
          <table:table-cell table:style-name="ce19" office:value-type="string" calcext:value-type="string">
            <text:p>pvalue_bh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significant_bh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P_all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2049760489756" calcext:value-type="float">
            <text:p>0,2049760489756</text:p>
          </table:table-cell>
          <table:table-cell table:style-name="ce20" office:value-type="float" office:value="0.478596079579307" calcext:value-type="float">
            <text:p>0,478596079579307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2" office:value-type="string" calcext:value-type="string">
            <text:p>BP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2049760489756" calcext:value-type="float">
            <text:p>0,2049760489756</text:p>
          </table:table-cell>
          <table:table-cell table:style-name="ce20" office:value-type="float" office:value="0.478596079579307" calcext:value-type="float">
            <text:p>0,478596079579307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2334483713701" calcext:value-type="float">
            <text:p>0,22334483713701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2334483713701" calcext:value-type="float">
            <text:p>0,22334483713701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01916633285933" calcext:value-type="float">
            <text:p>0,701916633285933</text:p>
          </table:table-cell>
          <table:table-cell table:style-name="ce21" office:value-type="float" office:value="0.915543434720782" calcext:value-type="float">
            <text:p>0,915543434720782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01916633285933" calcext:value-type="float">
            <text:p>0,701916633285933</text:p>
          </table:table-cell>
          <table:table-cell table:style-name="ce21" office:value-type="float" office:value="0.915543434720782" calcext:value-type="float">
            <text:p>0,915543434720782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405608138143587" calcext:value-type="float">
            <text:p>0,00405608138143587</text:p>
          </table:table-cell>
          <table:table-cell table:style-name="ce21" office:value-type="float" office:value="0.0192130170699594" calcext:value-type="float">
            <text:p>0,0192130170699594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405608138143587" calcext:value-type="float">
            <text:p>0,00405608138143587</text:p>
          </table:table-cell>
          <table:table-cell table:style-name="ce21" office:value-type="float" office:value="0.0192130170699594" calcext:value-type="float">
            <text:p>0,0192130170699594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196752962732796" calcext:value-type="float">
            <text:p>0,196752962732796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196752962732796" calcext:value-type="float">
            <text:p>0,196752962732796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187547574360596" calcext:value-type="float">
            <text:p>0,187547574360596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187547574360596" calcext:value-type="float">
            <text:p>0,187547574360596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409207234599837" calcext:value-type="float">
            <text:p>0,409207234599837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409207234599837" calcext:value-type="float">
            <text:p>0,409207234599837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192832056851929" calcext:value-type="float">
            <text:p>0,00192832056851929</text:p>
          </table:table-cell>
          <table:table-cell table:style-name="ce21" office:value-type="float" office:value="0.010846803197921" calcext:value-type="float">
            <text:p>0,010846803197921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192832056851929" calcext:value-type="float">
            <text:p>0,00192832056851929</text:p>
          </table:table-cell>
          <table:table-cell table:style-name="ce21" office:value-type="float" office:value="0.010846803197921" calcext:value-type="float">
            <text:p>0,01084680319792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502137368001034" calcext:value-type="float">
            <text:p>0,502137368001034</text:p>
          </table:table-cell>
          <table:table-cell table:style-name="ce21" office:value-type="float" office:value="0.695267124924509" calcext:value-type="float">
            <text:p>0,695267124924509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502137368001034" calcext:value-type="float">
            <text:p>0,502137368001034</text:p>
          </table:table-cell>
          <table:table-cell table:style-name="ce21" office:value-type="float" office:value="0.695267124924509" calcext:value-type="float">
            <text:p>0,695267124924509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3.47029152829879E-063" calcext:value-type="float">
            <text:p>3,47029152829879E-63</text:p>
          </table:table-cell>
          <table:table-cell table:style-name="ce21" office:value-type="float" office:value="1.56163118773446E-061" calcext:value-type="float">
            <text:p>1,56163118773446E-61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3.47029152829879E-063" calcext:value-type="float">
            <text:p>3,47029152829879E-63</text:p>
          </table:table-cell>
          <table:table-cell table:style-name="ce21" office:value-type="float" office:value="1.56163118773446E-061" calcext:value-type="float">
            <text:p>1,56163118773446E-6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06942452741588" calcext:value-type="float">
            <text:p>0,406942452741588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06942452741588" calcext:value-type="float">
            <text:p>0,406942452741588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</table:table-row>
        <table:table-row table:style-name="ro1">
          <table:table-cell table:style-name="ce4" office:value-type="string" calcext:value-type="string">
            <text:p>BP_all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2.70397804123172E-055" calcext:value-type="float">
            <text:p>2,70397804123172E-55</text:p>
          </table:table-cell>
          <table:table-cell table:style-name="ce22" office:value-type="float" office:value="6.08395059277136E-054" calcext:value-type="float">
            <text:p>6,08395059277136E-54</text:p>
          </table:table-cell>
          <table:covered-table-cell table:number-columns-repeated="2" table:style-name="ce1"/>
          <table:table-cell table:style-name="ce4" office:value-type="string" calcext:value-type="string">
            <text:p>BP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2.70397804123172E-055" calcext:value-type="float">
            <text:p>2,70397804123172E-55</text:p>
          </table:table-cell>
          <table:table-cell table:style-name="ce22" office:value-type="float" office:value="6.08395059277136E-054" calcext:value-type="float">
            <text:p>6,08395059277136E-54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>
            <text:p>MF_all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0951217415558044" calcext:value-type="float">
            <text:p>0,0951217415558044</text:p>
          </table:table-cell>
          <table:table-cell table:style-name="ce20" office:value-type="float" office:value="0.295205404828358" calcext:value-type="float">
            <text:p>0,295205404828358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5" office:value-type="string" calcext:value-type="string">
            <text:p>MF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0951217415558044" calcext:value-type="float">
            <text:p>0,0951217415558044</text:p>
          </table:table-cell>
          <table:table-cell table:style-name="ce20" office:value-type="float" office:value="0.295205404828358" calcext:value-type="float">
            <text:p>0,295205404828358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100196723858056" calcext:value-type="float">
            <text:p>0,0100196723858056</text:p>
          </table:table-cell>
          <table:table-cell table:style-name="ce21" office:value-type="float" office:value="0.0392074136835872" calcext:value-type="float">
            <text:p>0,039207413683587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100196723858056" calcext:value-type="float">
            <text:p>0,0100196723858056</text:p>
          </table:table-cell>
          <table:table-cell table:style-name="ce21" office:value-type="float" office:value="0.0392074136835872" calcext:value-type="float">
            <text:p>0,039207413683587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278494132557384" calcext:value-type="float">
            <text:p>0,278494132557384</text:p>
          </table:table-cell>
          <table:table-cell table:style-name="ce21" office:value-type="float" office:value="0.544879824568795" calcext:value-type="float">
            <text:p>0,54487982456879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278494132557384" calcext:value-type="float">
            <text:p>0,278494132557384</text:p>
          </table:table-cell>
          <table:table-cell table:style-name="ce21" office:value-type="float" office:value="0.544879824568795" calcext:value-type="float">
            <text:p>0,544879824568795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768479174801198" calcext:value-type="float">
            <text:p>0,76847917480119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768479174801198" calcext:value-type="float">
            <text:p>0,76847917480119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0926575007168325" calcext:value-type="float">
            <text:p>0,0926575007168325</text:p>
          </table:table-cell>
          <table:table-cell table:style-name="ce21" office:value-type="float" office:value="0.295205404828358" calcext:value-type="float">
            <text:p>0,295205404828358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0926575007168325" calcext:value-type="float">
            <text:p>0,0926575007168325</text:p>
          </table:table-cell>
          <table:table-cell table:style-name="ce21" office:value-type="float" office:value="0.295205404828358" calcext:value-type="float">
            <text:p>0,295205404828358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711190062675522" calcext:value-type="float">
            <text:p>0,00711190062675522</text:p>
          </table:table-cell>
          <table:table-cell table:style-name="ce21" office:value-type="float" office:value="0.0304795741146652" calcext:value-type="float">
            <text:p>0,030479574114665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711190062675522" calcext:value-type="float">
            <text:p>0,00711190062675522</text:p>
          </table:table-cell>
          <table:table-cell table:style-name="ce21" office:value-type="float" office:value="0.0304795741146652" calcext:value-type="float">
            <text:p>0,030479574114665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212293154789012" calcext:value-type="float">
            <text:p>0,212293154789012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212293154789012" calcext:value-type="float">
            <text:p>0,212293154789012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863363479335008" calcext:value-type="float">
            <text:p>0,86336347933500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863363479335008" calcext:value-type="float">
            <text:p>0,86336347933500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74194445654878" calcext:value-type="float">
            <text:p>0,474194445654878</text:p>
          </table:table-cell>
          <table:table-cell table:style-name="ce21" office:value-type="float" office:value="0.68834677595063" calcext:value-type="float">
            <text:p>0,68834677595063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74194445654878" calcext:value-type="float">
            <text:p>0,474194445654878</text:p>
          </table:table-cell>
          <table:table-cell table:style-name="ce21" office:value-type="float" office:value="0.68834677595063" calcext:value-type="float">
            <text:p>0,68834677595063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3.25538134522283E-026" calcext:value-type="float">
            <text:p>3,25538134522283E-26</text:p>
          </table:table-cell>
          <table:table-cell table:style-name="ce21" office:value-type="float" office:value="3.66230401337569E-025" calcext:value-type="float">
            <text:p>3,66230401337569E-2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3.25538134522283E-026" calcext:value-type="float">
            <text:p>3,25538134522283E-26</text:p>
          </table:table-cell>
          <table:table-cell table:style-name="ce21" office:value-type="float" office:value="3.66230401337569E-025" calcext:value-type="float">
            <text:p>3,66230401337569E-25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329995946274546" calcext:value-type="float">
            <text:p>0,329995946274546</text:p>
          </table:table-cell>
          <table:table-cell table:style-name="ce21" office:value-type="float" office:value="0.593992703294182" calcext:value-type="float">
            <text:p>0,59399270329418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329995946274546" calcext:value-type="float">
            <text:p>0,329995946274546</text:p>
          </table:table-cell>
          <table:table-cell table:style-name="ce21" office:value-type="float" office:value="0.593992703294182" calcext:value-type="float">
            <text:p>0,593992703294182</text:p>
          </table:table-cell>
          <table:covered-table-cell table:number-columns-repeated="2" table:style-name="ce1"/>
        </table:table-row>
        <table:table-row table:style-name="ro1">
          <table:table-cell table:style-name="ce7" office:value-type="string" calcext:value-type="string">
            <text:p>MF_all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1.09959746862499E-021" calcext:value-type="float">
            <text:p>1,09959746862499E-21</text:p>
          </table:table-cell>
          <table:table-cell table:style-name="ce22" office:value-type="float" office:value="9.89637721762494E-021" calcext:value-type="float">
            <text:p>9,89637721762494E-21</text:p>
          </table:table-cell>
          <table:covered-table-cell table:number-columns-repeated="2" table:style-name="ce1"/>
          <table:table-cell table:style-name="ce7" office:value-type="string" calcext:value-type="string">
            <text:p>MF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1.09959746862499E-021" calcext:value-type="float">
            <text:p>1,09959746862499E-21</text:p>
          </table:table-cell>
          <table:table-cell table:style-name="ce22" office:value-type="float" office:value="9.89637721762494E-021" calcext:value-type="float">
            <text:p>9,89637721762494E-21</text:p>
          </table:table-cell>
          <table:covered-table-cell table:number-columns-repeated="2" table:style-name="ce1"/>
        </table:table-row>
        <table:table-row table:style-name="ro1">
          <table:table-cell table:style-name="ce8" office:value-type="string" calcext:value-type="string">
            <text:p>CC_all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886282338370461" calcext:value-type="float">
            <text:p>0,886282338370461</text:p>
          </table:table-cell>
          <table:table-cell table:style-name="ce20" office:value-type="float" office:value="0.927504772713273" calcext:value-type="float">
            <text:p>0,927504772713273</text:p>
          </table:table-cell>
          <table:table-cell table:style-name="ce69" office:value-type="float" office:value="2" calcext:value-type="float" table:number-columns-spanned="1" table:number-rows-spanned="6">
            <text:p>2</text:p>
          </table:table-cell>
          <table:table-cell table:style-name="ce69" office:value-type="float" office:value="2" calcext:value-type="float" table:number-columns-spanned="1" table:number-rows-spanned="6">
            <text:p>2</text:p>
          </table:table-cell>
          <table:table-cell table:style-name="ce8" office:value-type="string" calcext:value-type="string">
            <text:p>CC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886282338370461" calcext:value-type="float">
            <text:p>0,886282338370461</text:p>
          </table:table-cell>
          <table:table-cell table:style-name="ce20" office:value-type="float" office:value="0.927504772713273" calcext:value-type="float">
            <text:p>0,927504772713273</text:p>
          </table:table-cell>
          <table:table-cell table:style-name="ce69" office:value-type="float" office:value="2" calcext:value-type="float" table:number-columns-spanned="1" table:number-rows-spanned="6">
            <text:p>2</text:p>
          </table:table-cell>
          <table:table-cell table:style-name="ce69" office:value-type="float" office:value="2" calcext:value-type="float" table:number-columns-spanned="1" table:number-rows-spanned="6">
            <text:p>2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20204274904648" calcext:value-type="float">
            <text:p>0,220204274904648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20204274904648" calcext:value-type="float">
            <text:p>0,220204274904648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90433396471904" calcext:value-type="float">
            <text:p>0,79043339647190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90433396471904" calcext:value-type="float">
            <text:p>0,79043339647190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866963819644034" calcext:value-type="float">
            <text:p>0,86696381964403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866963819644034" calcext:value-type="float">
            <text:p>0,86696381964403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00125129678492919" calcext:value-type="float">
            <text:p>0,000125129678492919</text:p>
          </table:table-cell>
          <table:table-cell table:style-name="ce21" office:value-type="float" office:value="0.000938472588696893" calcext:value-type="float">
            <text:p>0,000938472588696893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00125129678492919" calcext:value-type="float">
            <text:p>0,000125129678492919</text:p>
          </table:table-cell>
          <table:table-cell table:style-name="ce21" office:value-type="float" office:value="0.000938472588696893" calcext:value-type="float">
            <text:p>0,000938472588696893</text:p>
          </table:table-cell>
          <table:covered-table-cell table:number-columns-repeated="2" table:style-name="ce1"/>
        </table:table-row>
        <table:table-row table:style-name="ro1">
          <table:table-cell table:style-name="ce10" office:value-type="string" calcext:value-type="string">
            <text:p>CC_all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8.32276598686466E-034" calcext:value-type="float">
            <text:p>8,32276598686466E-34</text:p>
          </table:table-cell>
          <table:table-cell table:style-name="ce22" office:value-type="float" office:value="1.2484148980297E-032" calcext:value-type="float">
            <text:p>1,2484148980297E-32</text:p>
          </table:table-cell>
          <table:covered-table-cell table:number-columns-repeated="2" table:style-name="ce1"/>
          <table:table-cell table:style-name="ce10" office:value-type="string" calcext:value-type="string">
            <text:p>CC_peptides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8.32276598686466E-034" calcext:value-type="float">
            <text:p>8,32276598686466E-34</text:p>
          </table:table-cell>
          <table:table-cell table:style-name="ce22" office:value-type="float" office:value="1.2484148980297E-032" calcext:value-type="float">
            <text:p>1,2484148980297E-32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BP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750352702306961" calcext:value-type="float">
            <text:p>0,750352702306961</text:p>
          </table:table-cell>
          <table:table-cell table:style-name="ce20" office:value-type="float" office:value="0.927504772713273" calcext:value-type="float">
            <text:p>0,927504772713273</text:p>
          </table:table-cell>
          <table:table-cell table:style-name="ce69" office:value-type="float" office:value="1" calcext:value-type="float" table:number-columns-spanned="1" table:number-rows-spanned="12">
            <text:p>1</text:p>
          </table:table-cell>
          <table:table-cell table:style-name="ce69" office:value-type="float" office:value="1" calcext:value-type="float" table:number-columns-spanned="1" table:number-rows-spanned="12">
            <text:p>1</text:p>
          </table:table-cell>
          <table:table-cell/>
          <table:table-cell office:value-type="string" calcext:value-type="string">
            <text:p>nie są całkiem takie same w tych z podziałem na rodziny, a tu mogą być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557792719249432" calcext:value-type="float">
            <text:p>0,557792719249432</text:p>
          </table:table-cell>
          <table:table-cell table:style-name="ce21" office:value-type="float" office:value="0.760622132454925" calcext:value-type="float">
            <text:p>0,76062213245492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828776749423995" calcext:value-type="float">
            <text:p>0,828776749423995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428201342100715" calcext:value-type="float">
            <text:p>0,428201342100715</text:p>
          </table:table-cell>
          <table:table-cell table:style-name="ce21" office:value-type="float" office:value="0.664450358432144" calcext:value-type="float">
            <text:p>0,66445035843214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968828051460316" calcext:value-type="float">
            <text:p>0,968828051460316</text:p>
          </table:table-cell>
          <table:table-cell table:style-name="ce21" office:value-type="float" office:value="0.990846870811687" calcext:value-type="float">
            <text:p>0,99084687081168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496219546494417" calcext:value-type="float">
            <text:p>0,496219546494417</text:p>
          </table:table-cell>
          <table:table-cell table:style-name="ce21" office:value-type="float" office:value="0.695267124924509" calcext:value-type="float">
            <text:p>0,6952671249245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566240920827555" calcext:value-type="float">
            <text:p>0,566240920827555</text:p>
          </table:table-cell>
          <table:table-cell table:style-name="ce21" office:value-type="float" office:value="0.760622132454925" calcext:value-type="float">
            <text:p>0,76062213245492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471746117016154" calcext:value-type="float">
            <text:p>0,471746117016154</text:p>
          </table:table-cell>
          <table:table-cell table:style-name="ce21" office:value-type="float" office:value="0.68834677595063" calcext:value-type="float">
            <text:p>0,6883467759506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2144092838406" calcext:value-type="float">
            <text:p>0,42144092838406</text:p>
          </table:table-cell>
          <table:table-cell table:style-name="ce21" office:value-type="float" office:value="0.664450358432144" calcext:value-type="float">
            <text:p>0,66445035843214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00413937467051631" calcext:value-type="float">
            <text:p>0,000413937467051631</text:p>
          </table:table-cell>
          <table:table-cell table:style-name="ce21" office:value-type="float" office:value="0.00276908622144731" calcext:value-type="float">
            <text:p>0,0027690862214473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722920177796734" calcext:value-type="float">
            <text:p>0,0722920177796734</text:p>
          </table:table-cell>
          <table:table-cell table:style-name="ce21" office:value-type="float" office:value="0.260251264006824" calcext:value-type="float">
            <text:p>0,26025126400682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4" office:value-type="string" calcext:value-type="string">
            <text:p>BP_03_mean_score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0.273872049985046" calcext:value-type="float">
            <text:p>0,273872049985046</text:p>
          </table:table-cell>
          <table:table-cell table:style-name="ce22" office:value-type="float" office:value="0.544879824568795" calcext:value-type="float">
            <text:p>0,54487982456879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5" office:value-type="string" calcext:value-type="string">
            <text:p>MF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440773425146379" calcext:value-type="float">
            <text:p>0,440773425146379</text:p>
          </table:table-cell>
          <table:table-cell table:style-name="ce20" office:value-type="float" office:value="0.672366241748714" calcext:value-type="float">
            <text:p>0,672366241748714</text:p>
          </table:table-cell>
          <table:table-cell table:style-name="ce69" office:value-type="float" office:value="3" calcext:value-type="float" table:number-columns-spanned="1" table:number-rows-spanned="12">
            <text:p>3</text:p>
          </table:table-cell>
          <table:table-cell table:style-name="ce69" office:value-type="float" office:value="2" calcext:value-type="float" table:number-columns-spanned="1" table:number-rows-spanned="12">
            <text:p>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113232246259013" calcext:value-type="float">
            <text:p>0,113232246259013</text:p>
          </table:table-cell>
          <table:table-cell table:style-name="ce21" office:value-type="float" office:value="0.33969673877704" calcext:value-type="float">
            <text:p>0,3396967387770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381985614435734" calcext:value-type="float">
            <text:p>0,381985614435734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774468808208024" calcext:value-type="float">
            <text:p>0,77446880820802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883925777188962" calcext:value-type="float">
            <text:p>0,883925777188962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61882493563308" calcext:value-type="float">
            <text:p>0,261882493563308</text:p>
          </table:table-cell>
          <table:table-cell table:style-name="ce21" office:value-type="float" office:value="0.544879824568795" calcext:value-type="float">
            <text:p>0,54487982456879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814460953844084" calcext:value-type="float">
            <text:p>0,81446095384408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number-columns-repeated="2" table:style-name="ce21" office:value-type="float" office:value="1" calcext:value-type="float">
            <text:p>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0043074674555847" calcext:value-type="float">
            <text:p>0,00043074674555847</text:p>
          </table:table-cell>
          <table:table-cell table:style-name="ce21" office:value-type="float" office:value="0.00276908622144731" calcext:value-type="float">
            <text:p>0,0027690862214473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269278970309594" calcext:value-type="float">
            <text:p>0,0269278970309594</text:p>
          </table:table-cell>
          <table:table-cell table:style-name="ce21" office:value-type="float" office:value="0.100979613866098" calcext:value-type="float">
            <text:p>0,100979613866098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0259411503701828" calcext:value-type="float">
            <text:p>0,00259411503701828</text:p>
          </table:table-cell>
          <table:table-cell table:style-name="ce21" office:value-type="float" office:value="0.0137335501959791" calcext:value-type="float">
            <text:p>0,013733550195979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7" office:value-type="string" calcext:value-type="string">
            <text:p>MF_03_mean_score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0.328075074286113" calcext:value-type="float">
            <text:p>0,328075074286113</text:p>
          </table:table-cell>
          <table:table-cell table:style-name="ce22" office:value-type="float" office:value="0.593992703294182" calcext:value-type="float">
            <text:p>0,59399270329418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8" office:value-type="string" calcext:value-type="string">
            <text:p>CC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89858482517227" calcext:value-type="float">
            <text:p>0,89858482517227</text:p>
          </table:table-cell>
          <table:table-cell table:style-name="ce20" office:value-type="float" office:value="0.9295705087989" calcext:value-type="float">
            <text:p>0,9295705087989</text:p>
          </table:table-cell>
          <table:table-cell table:style-name="ce69" office:value-type="float" office:value="0" calcext:value-type="float" table:number-columns-spanned="1" table:number-rows-spanned="6">
            <text:p>0</text:p>
          </table:table-cell>
          <table:table-cell table:style-name="ce69" office:value-type="float" office:value="0" calcext:value-type="float" table:number-columns-spanned="1" table:number-rows-spanned="6">
            <text:p>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number-columns-repeated="2" table:style-name="ce21" office:value-type="float" office:value="1" calcext:value-type="float">
            <text:p>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33945459236438" calcext:value-type="float">
            <text:p>0,73394545923643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318383947709518" calcext:value-type="float">
            <text:p>0,318383947709518</text:p>
          </table:table-cell>
          <table:table-cell table:style-name="ce21" office:value-type="float" office:value="0.593992703294182" calcext:value-type="float">
            <text:p>0,59399270329418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360796412709369" calcext:value-type="float">
            <text:p>0,360796412709369</text:p>
          </table:table-cell>
          <table:table-cell table:style-name="ce21" office:value-type="float" office:value="0.636699551840062" calcext:value-type="float">
            <text:p>0,63669955184006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10" office:value-type="string" calcext:value-type="string">
            <text:p>CC_03_mean_score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0.828997279053796" calcext:value-type="float">
            <text:p>0,828997279053796</text:p>
          </table:table-cell>
          <table:table-cell table:style-name="ce22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2" office:value-type="string" calcext:value-type="string">
            <text:p>BP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2049760489756" calcext:value-type="float">
            <text:p>0,2049760489756</text:p>
          </table:table-cell>
          <table:table-cell table:style-name="ce20" office:value-type="float" office:value="0.478596079579307" calcext:value-type="float">
            <text:p>0,478596079579307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2334483713701" calcext:value-type="float">
            <text:p>0,22334483713701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01916633285933" calcext:value-type="float">
            <text:p>0,701916633285933</text:p>
          </table:table-cell>
          <table:table-cell table:style-name="ce21" office:value-type="float" office:value="0.915543434720782" calcext:value-type="float">
            <text:p>0,91554343472078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405608138143587" calcext:value-type="float">
            <text:p>0,00405608138143587</text:p>
          </table:table-cell>
          <table:table-cell table:style-name="ce21" office:value-type="float" office:value="0.0192130170699594" calcext:value-type="float">
            <text:p>0,019213017069959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196752962732796" calcext:value-type="float">
            <text:p>0,196752962732796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187547574360596" calcext:value-type="float">
            <text:p>0,187547574360596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409207234599837" calcext:value-type="float">
            <text:p>0,409207234599837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192832056851929" calcext:value-type="float">
            <text:p>0,00192832056851929</text:p>
          </table:table-cell>
          <table:table-cell table:style-name="ce21" office:value-type="float" office:value="0.010846803197921" calcext:value-type="float">
            <text:p>0,01084680319792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502137368001034" calcext:value-type="float">
            <text:p>0,502137368001034</text:p>
          </table:table-cell>
          <table:table-cell table:style-name="ce21" office:value-type="float" office:value="0.695267124924509" calcext:value-type="float">
            <text:p>0,6952671249245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3.47029152829879E-063" calcext:value-type="float">
            <text:p>3,47029152829879E-63</text:p>
          </table:table-cell>
          <table:table-cell table:style-name="ce21" office:value-type="float" office:value="1.56163118773446E-061" calcext:value-type="float">
            <text:p>1,56163118773446E-6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06942452741588" calcext:value-type="float">
            <text:p>0,406942452741588</text:p>
          </table:table-cell>
          <table:table-cell table:style-name="ce21" office:value-type="float" office:value="0.657654484178309" calcext:value-type="float">
            <text:p>0,6576544841783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4" office:value-type="string" calcext:value-type="string">
            <text:p>BP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2.70397804123172E-055" calcext:value-type="float">
            <text:p>2,70397804123172E-55</text:p>
          </table:table-cell>
          <table:table-cell table:style-name="ce22" office:value-type="float" office:value="6.08395059277136E-054" calcext:value-type="float">
            <text:p>6,08395059277136E-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5" office:value-type="string" calcext:value-type="string">
            <text:p>MF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0951217415558044" calcext:value-type="float">
            <text:p>0,0951217415558044</text:p>
          </table:table-cell>
          <table:table-cell table:style-name="ce20" office:value-type="float" office:value="0.295205404828358" calcext:value-type="float">
            <text:p>0,295205404828358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style-name="ce69" office:value-type="float" office:value="4" calcext:value-type="float" table:number-columns-spanned="1" table:number-rows-spanned="12">
            <text:p>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100196723858056" calcext:value-type="float">
            <text:p>0,0100196723858056</text:p>
          </table:table-cell>
          <table:table-cell table:style-name="ce21" office:value-type="float" office:value="0.0392074136835872" calcext:value-type="float">
            <text:p>0,039207413683587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278494132557384" calcext:value-type="float">
            <text:p>0,278494132557384</text:p>
          </table:table-cell>
          <table:table-cell table:style-name="ce21" office:value-type="float" office:value="0.544879824568795" calcext:value-type="float">
            <text:p>0,54487982456879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768479174801198" calcext:value-type="float">
            <text:p>0,76847917480119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0926575007168325" calcext:value-type="float">
            <text:p>0,0926575007168325</text:p>
          </table:table-cell>
          <table:table-cell table:style-name="ce21" office:value-type="float" office:value="0.295205404828358" calcext:value-type="float">
            <text:p>0,295205404828358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00711190062675522" calcext:value-type="float">
            <text:p>0,00711190062675522</text:p>
          </table:table-cell>
          <table:table-cell table:style-name="ce21" office:value-type="float" office:value="0.0304795741146652" calcext:value-type="float">
            <text:p>0,030479574114665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212293154789012" calcext:value-type="float">
            <text:p>0,212293154789012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863363479335008" calcext:value-type="float">
            <text:p>0,863363479335008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474194445654878" calcext:value-type="float">
            <text:p>0,474194445654878</text:p>
          </table:table-cell>
          <table:table-cell table:style-name="ce21" office:value-type="float" office:value="0.68834677595063" calcext:value-type="float">
            <text:p>0,6883467759506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3.25538134522283E-026" calcext:value-type="float">
            <text:p>3,25538134522283E-26</text:p>
          </table:table-cell>
          <table:table-cell table:style-name="ce21" office:value-type="float" office:value="3.66230401337569E-025" calcext:value-type="float">
            <text:p>3,66230401337569E-2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329995946274546" calcext:value-type="float">
            <text:p>0,329995946274546</text:p>
          </table:table-cell>
          <table:table-cell table:style-name="ce21" office:value-type="float" office:value="0.593992703294182" calcext:value-type="float">
            <text:p>0,59399270329418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7" office:value-type="string" calcext:value-type="string">
            <text:p>MF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1.09959746862499E-021" calcext:value-type="float">
            <text:p>1,09959746862499E-21</text:p>
          </table:table-cell>
          <table:table-cell table:style-name="ce22" office:value-type="float" office:value="9.89637721762494E-021" calcext:value-type="float">
            <text:p>9,89637721762494E-2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8" office:value-type="string" calcext:value-type="string">
            <text:p>CC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15" office:value-type="string" calcext:value-type="string">
            <text:p>known</text:p>
          </table:table-cell>
          <table:table-cell table:style-name="ce20" office:value-type="float" office:value="0.886282338370461" calcext:value-type="float">
            <text:p>0,886282338370461</text:p>
          </table:table-cell>
          <table:table-cell table:style-name="ce20" office:value-type="float" office:value="0.927504772713273" calcext:value-type="float">
            <text:p>0,927504772713273</text:p>
          </table:table-cell>
          <table:table-cell table:style-name="ce69" office:value-type="float" office:value="2" calcext:value-type="float" table:number-columns-spanned="1" table:number-rows-spanned="6">
            <text:p>2</text:p>
          </table:table-cell>
          <table:table-cell table:style-name="ce69" office:value-type="float" office:value="2" calcext:value-type="float" table:number-columns-spanned="1" table:number-rows-spanned="6">
            <text:p>2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220204274904648" calcext:value-type="float">
            <text:p>0,220204274904648</text:p>
          </table:table-cell>
          <table:table-cell table:style-name="ce21" office:value-type="float" office:value="0.478596079579307" calcext:value-type="float">
            <text:p>0,4785960795793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known</text:p>
          </table:table-cell>
          <table:table-cell table:style-name="ce21" office:value-type="float" office:value="0.790433396471904" calcext:value-type="float">
            <text:p>0,79043339647190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float" office:value="0.866963819644034" calcext:value-type="float">
            <text:p>0,866963819644034</text:p>
          </table:table-cell>
          <table:table-cell table:style-name="ce21" office:value-type="float" office:value="0.927504772713273" calcext:value-type="float">
            <text:p>0,92750477271327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16" office:value-type="string" calcext:value-type="string">
            <text:p>differences</text:p>
          </table:table-cell>
          <table:table-cell table:style-name="ce21" office:value-type="float" office:value="0.000125129678492919" calcext:value-type="float">
            <text:p>0,000125129678492919</text:p>
          </table:table-cell>
          <table:table-cell table:style-name="ce21" office:value-type="float" office:value="0.000938472588696893" calcext:value-type="float">
            <text:p>0,00093847258869689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10" office:value-type="string" calcext:value-type="string">
            <text:p>CC_peptides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17" office:value-type="string" calcext:value-type="string">
            <text:p>differences</text:p>
          </table:table-cell>
          <table:table-cell table:style-name="ce22" office:value-type="float" office:value="8.32276598686466E-034" calcext:value-type="float">
            <text:p>8,32276598686466E-34</text:p>
          </table:table-cell>
          <table:table-cell table:style-name="ce22" office:value-type="float" office:value="1.2484148980297E-032" calcext:value-type="float">
            <text:p>1,2484148980297E-32</text:p>
          </table:table-cell>
          <table:covered-table-cell table:number-columns-repeated="2" table:style-name="ce1"/>
          <table:table-cell table:number-columns-repeated="7"/>
        </table:table-row>
        <table:table-row table:style-name="ro1" table:number-rows-repeated="1048484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combined_families.D2:combined_families.E91 combined_families.K2:combined_families.L31">
            <calcext:condition calcext:apply-style-name="Good" calcext:value="&lt;0.05" calcext:base-cell-address="combined_families.D2"/>
          </calcext:conditional-format>
          <calcext:conditional-format calcext:target-range-address="combined_families.D1:combined_families.E1">
            <calcext:condition calcext:apply-style-name="Good" calcext:value="&lt;0.05" calcext:base-cell-address="combined_families.D1"/>
          </calcext:conditional-format>
          <calcext:conditional-format calcext:target-range-address="combined_families.C1:combined_families.C1048576 combined_families.J2:combined_families.J31">
            <calcext:condition calcext:apply-style-name="Accent 2" calcext:value="contains-text(&quot;unknown&quot;)" calcext:base-cell-address="combined_families.C1"/>
          </calcext:conditional-format>
          <calcext:conditional-format calcext:target-range-address="combined_families.C1:combined_families.C1048576 combined_families.J2:combined_families.J31">
            <calcext:condition calcext:apply-style-name="Accent 1" calcext:value="contains-text(&quot;known&quot;)" calcext:base-cell-address="combined_families.C1"/>
          </calcext:conditional-format>
          <calcext:conditional-format calcext:target-range-address="combined_families.C1:combined_families.C1048576 combined_families.J2:combined_families.J31">
            <calcext:condition calcext:apply-style-name="Accent 3" calcext:value="contains-text(&quot;differences&quot;)" calcext:base-cell-address="combined_families.C1"/>
          </calcext:conditional-format>
        </calcext:conditional-formats>
      </table:table>
      <table:table table:name="separate_families_count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ce28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24" office:value-type="string" calcext:value-type="string">
            <text:p>data_type</text:p>
          </table:table-cell>
          <table:table-cell table:style-name="ce29" office:value-type="string" calcext:value-type="string">
            <text:p>pvalue</text:p>
          </table:table-cell>
          <table:table-cell table:style-name="ce29" office:value-type="string" calcext:value-type="string">
            <text:p>pvalue_bh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significant_bh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P_all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666715384115904" calcext:value-type="float">
            <text:p>0,666715384115904</text:p>
          </table:table-cell>
          <table:table-cell table:style-name="ce77" office:value-type="float" office:value="0.84216680098851" calcext:value-type="float">
            <text:p>0,84216680098851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style-name="ce69" office:value-type="float" office:value="2" calcext:value-type="float" table:number-columns-spanned="1" table:number-rows-spanned="16">
            <text:p>2</text:p>
          </table:table-cell>
          <table:table-cell table:style-name="ce2" office:value-type="string" calcext:value-type="string">
            <text:p>BP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654009754487684" calcext:value-type="float">
            <text:p>0,654009754487684</text:p>
          </table:table-cell>
          <table:table-cell table:style-name="ce77" office:value-type="float" office:value="0.840573326518175" calcext:value-type="float">
            <text:p>0,840573326518175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style-name="ce69" office:value-type="float" office:value="2" calcext:value-type="float" table:number-columns-spanned="1" table:number-rows-spanned="16">
            <text:p>2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22238291056081" calcext:value-type="float">
            <text:p>0,0322238291056081</text:p>
          </table:table-cell>
          <table:table-cell table:style-name="ce78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84581615643223" calcext:value-type="float">
            <text:p>0,0384581615643223</text:p>
          </table:table-cell>
          <table:table-cell table:style-name="ce78" office:value-type="float" office:value="0.109880461612349" calcext:value-type="float">
            <text:p>0,109880461612349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760073570957208" calcext:value-type="float">
            <text:p>0,760073570957208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760073570957208" calcext:value-type="float">
            <text:p>0,760073570957208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6289232342948" calcext:value-type="float">
            <text:p>0,306289232342948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6289232342948" calcext:value-type="float">
            <text:p>0,306289232342948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2.64675614503226E-017" calcext:value-type="float">
            <text:p>2,64675614503226E-17</text:p>
          </table:table-cell>
          <table:table-cell table:style-name="ce78" office:value-type="float" office:value="1.58805368701936E-015" calcext:value-type="float">
            <text:p>1,58805368701936E-15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2.64675614503226E-017" calcext:value-type="float">
            <text:p>2,64675614503226E-17</text:p>
          </table:table-cell>
          <table:table-cell table:style-name="ce78" office:value-type="float" office:value="1.58805368701936E-015" calcext:value-type="float">
            <text:p>1,58805368701936E-15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4150076711426" calcext:value-type="float">
            <text:p>0,304150076711426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4150076711426" calcext:value-type="float">
            <text:p>0,304150076711426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515610082684798" calcext:value-type="float">
            <text:p>0,515610082684798</text:p>
          </table:table-cell>
          <table:table-cell table:style-name="ce78" office:value-type="float" office:value="0.778146660696064" calcext:value-type="float">
            <text:p>0,778146660696064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539794670134714" calcext:value-type="float">
            <text:p>0,539794670134714</text:p>
          </table:table-cell>
          <table:table-cell table:style-name="ce78" office:value-type="float" office:value="0.799695807606983" calcext:value-type="float">
            <text:p>0,799695807606983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143349218710439" calcext:value-type="float">
            <text:p>0,0143349218710439</text:p>
          </table:table-cell>
          <table:table-cell table:style-name="ce78" office:value-type="float" office:value="0.0596887462115847" calcext:value-type="float">
            <text:p>0,059688746211584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144247803344663" calcext:value-type="float">
            <text:p>0,0144247803344663</text:p>
          </table:table-cell>
          <table:table-cell table:style-name="ce78" office:value-type="float" office:value="0.0596887462115847" calcext:value-type="float">
            <text:p>0,0596887462115847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311419077029502" calcext:value-type="float">
            <text:p>0,311419077029502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311419077029502" calcext:value-type="float">
            <text:p>0,311419077029502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25556387869713" calcext:value-type="float">
            <text:p>0,72555638786971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25556387869713" calcext:value-type="float">
            <text:p>0,72555638786971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165195793284054" calcext:value-type="float">
            <text:p>0,0165195793284054</text:p>
          </table:table-cell>
          <table:table-cell table:style-name="ce78" office:value-type="float" office:value="0.0639467586906014" calcext:value-type="float">
            <text:p>0,0639467586906014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165195793284054" calcext:value-type="float">
            <text:p>0,0165195793284054</text:p>
          </table:table-cell>
          <table:table-cell table:style-name="ce78" office:value-type="float" office:value="0.0639467586906014" calcext:value-type="float">
            <text:p>0,0639467586906014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846427151304018" calcext:value-type="float">
            <text:p>0,846427151304018</text:p>
          </table:table-cell>
          <table:table-cell table:style-name="ce78" office:value-type="float" office:value="0.898860691650285" calcext:value-type="float">
            <text:p>0,898860691650285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846427151304018" calcext:value-type="float">
            <text:p>0,846427151304018</text:p>
          </table:table-cell>
          <table:table-cell table:style-name="ce78" office:value-type="float" office:value="0.898860691650285" calcext:value-type="float">
            <text:p>0,898860691650285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000623910014897909" calcext:value-type="float">
            <text:p>6,23910014897909E-09</text:p>
          </table:table-cell>
          <table:table-cell table:style-name="ce78" office:value-type="float" office:value="0.000000074869201787749" calcext:value-type="float">
            <text:p>7,4869201787749E-08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000119737928627593" calcext:value-type="float">
            <text:p>1,19737928627593E-09</text:p>
          </table:table-cell>
          <table:table-cell table:style-name="ce78" office:value-type="float" office:value="0.0000000159650571503457" calcext:value-type="float">
            <text:p>1,59650571503457E-08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647132946453214" calcext:value-type="float">
            <text:p>0,647132946453214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647132946453214" calcext:value-type="float">
            <text:p>0,647132946453214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236215885716021" calcext:value-type="float">
            <text:p>0,236215885716021</text:p>
          </table:table-cell>
          <table:table-cell table:style-name="ce78" office:value-type="float" office:value="0.524924190480047" calcext:value-type="float">
            <text:p>0,52492419048004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193000892076882" calcext:value-type="float">
            <text:p>0,193000892076882</text:p>
          </table:table-cell>
          <table:table-cell table:style-name="ce78" office:value-type="float" office:value="0.436983151872186" calcext:value-type="float">
            <text:p>0,436983151872186</text:p>
          </table:table-cell>
          <table:covered-table-cell table:number-columns-repeated="2" table:style-name="ce1"/>
        </table:table-row>
        <table:table-row table:style-name="ro1">
          <table:table-cell table:style-name="ce4" office:value-type="string" calcext:value-type="string">
            <text:p>BP_all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952791995327172" calcext:value-type="float">
            <text:p>0,952791995327172</text:p>
          </table:table-cell>
          <table:table-cell table:style-name="ce79" office:value-type="float" office:value="0.956163692859243" calcext:value-type="float">
            <text:p>0,956163692859243</text:p>
          </table:table-cell>
          <table:covered-table-cell table:number-columns-repeated="2" table:style-name="ce1"/>
          <table:table-cell table:style-name="ce4" office:value-type="string" calcext:value-type="string">
            <text:p>BP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952791995327172" calcext:value-type="float">
            <text:p>0,952791995327172</text:p>
          </table:table-cell>
          <table:table-cell table:style-name="ce79" office:value-type="float" office:value="0.956163692859243" calcext:value-type="float">
            <text:p>0,956163692859243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>
            <text:p>MF_all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0461044071575433" calcext:value-type="float">
            <text:p>0,0461044071575433</text:p>
          </table:table-cell>
          <table:table-cell table:style-name="ce77" office:value-type="float" office:value="0.123991474749122" calcext:value-type="float">
            <text:p>0,123991474749122</text:p>
          </table:table-cell>
          <table:table-cell table:style-name="ce69" office:value-type="float" office:value="8" calcext:value-type="float" table:number-columns-spanned="1" table:number-rows-spanned="16">
            <text:p>8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style-name="ce5" office:value-type="string" calcext:value-type="string">
            <text:p>MF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0466953931123369" calcext:value-type="float">
            <text:p>0,0466953931123369</text:p>
          </table:table-cell>
          <table:table-cell table:style-name="ce77" office:value-type="float" office:value="0.123991474749122" calcext:value-type="float">
            <text:p>0,123991474749122</text:p>
          </table:table-cell>
          <table:table-cell table:style-name="ce69" office:value-type="float" office:value="8" calcext:value-type="float" table:number-columns-spanned="1" table:number-rows-spanned="16">
            <text:p>8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08788727430572" calcext:value-type="float">
            <text:p>0,0308788727430572</text:p>
          </table:table-cell>
          <table:table-cell table:style-name="ce78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294394800437265" calcext:value-type="float">
            <text:p>0,0294394800437265</text:p>
          </table:table-cell>
          <table:table-cell table:style-name="ce78" office:value-type="float" office:value="0.0999583152004235" calcext:value-type="float">
            <text:p>0,0999583152004235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480561022741256" calcext:value-type="float">
            <text:p>0,480561022741256</text:p>
          </table:table-cell>
          <table:table-cell table:style-name="ce78" office:value-type="float" office:value="0.770641444440807" calcext:value-type="float">
            <text:p>0,770641444440807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480561022741256" calcext:value-type="float">
            <text:p>0,480561022741256</text:p>
          </table:table-cell>
          <table:table-cell table:style-name="ce78" office:value-type="float" office:value="0.770641444440807" calcext:value-type="float">
            <text:p>0,770641444440807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518764440464043" calcext:value-type="float">
            <text:p>0,518764440464043</text:p>
          </table:table-cell>
          <table:table-cell table:style-name="ce78" office:value-type="float" office:value="0.778146660696064" calcext:value-type="float">
            <text:p>0,778146660696064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518764440464043" calcext:value-type="float">
            <text:p>0,518764440464043</text:p>
          </table:table-cell>
          <table:table-cell table:style-name="ce78" office:value-type="float" office:value="0.778146660696064" calcext:value-type="float">
            <text:p>0,778146660696064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00567077045082056" calcext:value-type="float">
            <text:p>5,67077045082056E-12</text:p>
          </table:table-cell>
          <table:table-cell table:style-name="ce78" office:value-type="float" office:value="0.000000000136098490819693" calcext:value-type="float">
            <text:p>1,36098490819693E-10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00567077045082056" calcext:value-type="float">
            <text:p>5,67077045082056E-12</text:p>
          </table:table-cell>
          <table:table-cell table:style-name="ce78" office:value-type="float" office:value="0.000000000136098490819693" calcext:value-type="float">
            <text:p>1,36098490819693E-10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103626817752368" calcext:value-type="float">
            <text:p>0,0103626817752368</text:p>
          </table:table-cell>
          <table:table-cell table:style-name="ce78" office:value-type="float" office:value="0.046056363445497" calcext:value-type="float">
            <text:p>0,046056363445497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103626817752368" calcext:value-type="float">
            <text:p>0,0103626817752368</text:p>
          </table:table-cell>
          <table:table-cell table:style-name="ce78" office:value-type="float" office:value="0.046056363445497" calcext:value-type="float">
            <text:p>0,046056363445497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723614994558323" calcext:value-type="float">
            <text:p>0,72361499455832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747659333622127" calcext:value-type="float">
            <text:p>0,747659333622127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24908921475643" calcext:value-type="float">
            <text:p>0,72490892147564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30954261712483" calcext:value-type="float">
            <text:p>0,73095426171248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451361844329704" calcext:value-type="float">
            <text:p>0,451361844329704</text:p>
          </table:table-cell>
          <table:table-cell table:style-name="ce78" office:value-type="float" office:value="0.752269740549506" calcext:value-type="float">
            <text:p>0,752269740549506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451361844329704" calcext:value-type="float">
            <text:p>0,451361844329704</text:p>
          </table:table-cell>
          <table:table-cell table:style-name="ce78" office:value-type="float" office:value="0.752269740549506" calcext:value-type="float">
            <text:p>0,752269740549506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65844910577257" calcext:value-type="float">
            <text:p>0,65844910577257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65844910577257" calcext:value-type="float">
            <text:p>0,65844910577257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154399733488566" calcext:value-type="float">
            <text:p>1,54399733488566E-08</text:p>
          </table:table-cell>
          <table:table-cell table:style-name="ce78" office:value-type="float" office:value="0.000000154399733488566" calcext:value-type="float">
            <text:p>1,54399733488566E-07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154399733488566" calcext:value-type="float">
            <text:p>1,54399733488566E-08</text:p>
          </table:table-cell>
          <table:table-cell table:style-name="ce78" office:value-type="float" office:value="0.000000154399733488566" calcext:value-type="float">
            <text:p>1,54399733488566E-07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101969984233117" calcext:value-type="float">
            <text:p>0,101969984233117</text:p>
          </table:table-cell>
          <table:table-cell table:style-name="ce78" office:value-type="float" office:value="0.24472796215948" calcext:value-type="float">
            <text:p>0,24472796215948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101969984233117" calcext:value-type="float">
            <text:p>0,101969984233117</text:p>
          </table:table-cell>
          <table:table-cell table:style-name="ce78" office:value-type="float" office:value="0.24472796215948" calcext:value-type="float">
            <text:p>0,24472796215948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356667913870058" calcext:value-type="float">
            <text:p>3,56667913870058E-06</text:p>
          </table:table-cell>
          <table:table-cell table:style-name="ce78" office:value-type="float" office:value="0.0000285334331096047" calcext:value-type="float">
            <text:p>2,85334331096047E-0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202294512025869" calcext:value-type="float">
            <text:p>2,02294512025869E-06</text:p>
          </table:table-cell>
          <table:table-cell table:style-name="ce78" office:value-type="float" office:value="0.0000186733395716187" calcext:value-type="float">
            <text:p>1,86733395716187E-05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353742260571521" calcext:value-type="float">
            <text:p>0,000353742260571521</text:p>
          </table:table-cell>
          <table:table-cell table:style-name="ce78" office:value-type="float" office:value="0.0018456117942862" calcext:value-type="float">
            <text:p>0,001845611794286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353742260571521" calcext:value-type="float">
            <text:p>0,000353742260571521</text:p>
          </table:table-cell>
          <table:table-cell table:style-name="ce78" office:value-type="float" office:value="0.0018456117942862" calcext:value-type="float">
            <text:p>0,001845611794286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561935254591621" calcext:value-type="float">
            <text:p>0,561935254591621</text:p>
          </table:table-cell>
          <table:table-cell table:style-name="ce78" office:value-type="float" office:value="0.822344275012129" calcext:value-type="float">
            <text:p>0,822344275012129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648735885412574" calcext:value-type="float">
            <text:p>0,648735885412574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</table:table-row>
        <table:table-row table:style-name="ro1">
          <table:table-cell table:style-name="ce7" office:value-type="string" calcext:value-type="string">
            <text:p>MF_all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324864524401376" calcext:value-type="float">
            <text:p>0,0324864524401376</text:p>
          </table:table-cell>
          <table:table-cell table:style-name="ce79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style-name="ce7" office:value-type="string" calcext:value-type="string">
            <text:p>MF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324864524401376" calcext:value-type="float">
            <text:p>0,0324864524401376</text:p>
          </table:table-cell>
          <table:table-cell table:style-name="ce79" office:value-type="float" office:value="0.0999583152004235" calcext:value-type="float">
            <text:p>0,0999583152004235</text:p>
          </table:table-cell>
          <table:covered-table-cell table:number-columns-repeated="2" table:style-name="ce1"/>
        </table:table-row>
        <table:table-row table:style-name="ro1">
          <table:table-cell table:style-name="ce8" office:value-type="string" calcext:value-type="string">
            <text:p>CC_all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3630181389202" calcext:value-type="float">
            <text:p>0,3630181389202</text:p>
          </table:table-cell>
          <table:table-cell table:style-name="ce77" office:value-type="float" office:value="0.660032979854909" calcext:value-type="float">
            <text:p>0,660032979854909</text:p>
          </table:table-cell>
          <table:table-cell table:style-name="ce69" office:value-type="float" office:value="4" calcext:value-type="float" table:number-columns-spanned="1" table:number-rows-spanned="8">
            <text:p>4</text:p>
          </table:table-cell>
          <table:table-cell table:style-name="ce69" office:value-type="float" office:value="2" calcext:value-type="float" table:number-columns-spanned="1" table:number-rows-spanned="8">
            <text:p>2</text:p>
          </table:table-cell>
          <table:table-cell table:style-name="ce8" office:value-type="string" calcext:value-type="string">
            <text:p>CC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377538784874239" calcext:value-type="float">
            <text:p>0,377538784874239</text:p>
          </table:table-cell>
          <table:table-cell table:style-name="ce77" office:value-type="float" office:value="0.676188868431473" calcext:value-type="float">
            <text:p>0,676188868431473</text:p>
          </table:table-cell>
          <table:table-cell table:style-name="ce69" office:value-type="float" office:value="4" calcext:value-type="float" table:number-columns-spanned="1" table:number-rows-spanned="8">
            <text:p>4</text:p>
          </table:table-cell>
          <table:table-cell table:style-name="ce69" office:value-type="float" office:value="2" calcext:value-type="float" table:number-columns-spanned="1" table:number-rows-spanned="8">
            <text:p>2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680816088399644" calcext:value-type="float">
            <text:p>0,0680816088399644</text:p>
          </table:table-cell>
          <table:table-cell table:style-name="ce78" office:value-type="float" office:value="0.173825384272249" calcext:value-type="float">
            <text:p>0,173825384272249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707753671880839" calcext:value-type="float">
            <text:p>0,0707753671880839</text:p>
          </table:table-cell>
          <table:table-cell table:style-name="ce78" office:value-type="float" office:value="0.17693841797021" calcext:value-type="float">
            <text:p>0,17693841797021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930631769090625" calcext:value-type="float">
            <text:p>0,930631769090625</text:p>
          </table:table-cell>
          <table:table-cell table:style-name="ce78" office:value-type="float" office:value="0.956163692859243" calcext:value-type="float">
            <text:p>0,956163692859243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930631769090625" calcext:value-type="float">
            <text:p>0,930631769090625</text:p>
          </table:table-cell>
          <table:table-cell table:style-name="ce78" office:value-type="float" office:value="0.956163692859243" calcext:value-type="float">
            <text:p>0,956163692859243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17260253686097" calcext:value-type="float">
            <text:p>0,717260253686097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17260253686097" calcext:value-type="float">
            <text:p>0,717260253686097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230516345633206" calcext:value-type="float">
            <text:p>2,30516345633206E-10</text:p>
          </table:table-cell>
          <table:table-cell table:style-name="ce78" office:value-type="float" office:value="0.00000000395170878228354" calcext:value-type="float">
            <text:p>3,95170878228354E-09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230516345633206" calcext:value-type="float">
            <text:p>2,30516345633206E-10</text:p>
          </table:table-cell>
          <table:table-cell table:style-name="ce78" office:value-type="float" office:value="0.00000000395170878228354" calcext:value-type="float">
            <text:p>3,95170878228354E-09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5761685969061" calcext:value-type="float">
            <text:p>0,035761685969061</text:p>
          </table:table-cell>
          <table:table-cell table:style-name="ce78" office:value-type="float" office:value="0.10466834917774" calcext:value-type="float">
            <text:p>0,10466834917774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5761685969061" calcext:value-type="float">
            <text:p>0,035761685969061</text:p>
          </table:table-cell>
          <table:table-cell table:style-name="ce78" office:value-type="float" office:value="0.10466834917774" calcext:value-type="float">
            <text:p>0,10466834917774</text:p>
          </table:table-cell>
          <table:covered-table-cell table:number-columns-repeated="2" table:style-name="ce1"/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126960252421017" calcext:value-type="float">
            <text:p>0,000126960252421017</text:p>
          </table:table-cell>
          <table:table-cell table:style-name="ce78" office:value-type="float" office:value="0.000761761514526101" calcext:value-type="float">
            <text:p>0,000761761514526101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115413433224258" calcext:value-type="float">
            <text:p>0,000115413433224258</text:p>
          </table:table-cell>
          <table:table-cell table:style-name="ce78" office:value-type="float" office:value="0.000728926946679525" calcext:value-type="float">
            <text:p>0,000728926946679525</text:p>
          </table:table-cell>
          <table:covered-table-cell table:number-columns-repeated="2" table:style-name="ce1"/>
        </table:table-row>
        <table:table-row table:style-name="ro1">
          <table:table-cell table:style-name="ce10" office:value-type="string" calcext:value-type="string">
            <text:p>CC_all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283763535075544" calcext:value-type="float">
            <text:p>0,0283763535075544</text:p>
          </table:table-cell>
          <table:table-cell table:style-name="ce79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style-name="ce10" office:value-type="string" calcext:value-type="string">
            <text:p>CC_peptides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283763535075544" calcext:value-type="float">
            <text:p>0,0283763535075544</text:p>
          </table:table-cell>
          <table:table-cell table:style-name="ce79" office:value-type="float" office:value="0.0999583152004235" calcext:value-type="float">
            <text:p>0,0999583152004235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BP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823758361711109" calcext:value-type="float">
            <text:p>0,823758361711109</text:p>
          </table:table-cell>
          <table:table-cell table:style-name="ce77" office:value-type="float" office:value="0.892897362321889" calcext:value-type="float">
            <text:p>0,892897362321889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style-name="ce69" office:value-type="float" office:value="3" calcext:value-type="float" table:number-columns-spanned="1" table:number-rows-spanned="16">
            <text:p>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number-columns-repeated="2" table:style-name="ce78" office:value-type="float" office:value="0.956163692859243" calcext:value-type="float">
            <text:p>0,95616369285924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285989928470735" calcext:value-type="float">
            <text:p>0,0285989928470735</text:p>
          </table:table-cell>
          <table:table-cell table:style-name="ce78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58337899778543" calcext:value-type="float">
            <text:p>0,58337899778543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0000115255656318766" calcext:value-type="float">
            <text:p>1,15255656318766E-14</text:p>
          </table:table-cell>
          <table:table-cell table:style-name="ce78" office:value-type="float" office:value="0.000000000000461022625275064" calcext:value-type="float">
            <text:p>4,61022625275064E-1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36678486436605" calcext:value-type="float">
            <text:p>0,736678486436605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646923031748235" calcext:value-type="float">
            <text:p>0,646923031748235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269197751297771" calcext:value-type="float">
            <text:p>0,269197751297771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269719544280214" calcext:value-type="float">
            <text:p>0,269719544280214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481650902775505" calcext:value-type="float">
            <text:p>0,481650902775505</text:p>
          </table:table-cell>
          <table:table-cell table:style-name="ce78" office:value-type="float" office:value="0.770641444440807" calcext:value-type="float">
            <text:p>0,7706414444408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394463399329261" calcext:value-type="float">
            <text:p>0,000394463399329261</text:p>
          </table:table-cell>
          <table:table-cell table:style-name="ce78" office:value-type="float" office:value="0.0019723169966463" calcext:value-type="float">
            <text:p>0,001972316996646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440109588217215" calcext:value-type="float">
            <text:p>0,440109588217215</text:p>
          </table:table-cell>
          <table:table-cell table:style-name="ce78" office:value-type="float" office:value="0.752269740549506" calcext:value-type="float">
            <text:p>0,75226974054950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475300653204968" calcext:value-type="float">
            <text:p>0,0475300653204968</text:p>
          </table:table-cell>
          <table:table-cell table:style-name="ce78" office:value-type="float" office:value="0.123991474749122" calcext:value-type="float">
            <text:p>0,12399147474912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908918153937572" calcext:value-type="float">
            <text:p>9,08918153937572E-06</text:p>
          </table:table-cell>
          <table:table-cell table:style-name="ce78" office:value-type="float" office:value="0.0000681688615453179" calcext:value-type="float">
            <text:p>6,81688615453179E-0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149413681056821" calcext:value-type="float">
            <text:p>0,149413681056821</text:p>
          </table:table-cell>
          <table:table-cell table:style-name="ce78" office:value-type="float" office:value="0.344800802438817" calcext:value-type="float">
            <text:p>0,34480080243881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4" office:value-type="string" calcext:value-type="string">
            <text:p>BP_03_mean_score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951487297949861" calcext:value-type="float">
            <text:p>0,951487297949861</text:p>
          </table:table-cell>
          <table:table-cell table:style-name="ce79" office:value-type="float" office:value="0.956163692859243" calcext:value-type="float">
            <text:p>0,95616369285924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5" office:value-type="string" calcext:value-type="string">
            <text:p>MF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041512793286693" calcext:value-type="float">
            <text:p>0,041512793286693</text:p>
          </table:table-cell>
          <table:table-cell table:style-name="ce77" office:value-type="float" office:value="0.115849655683795" calcext:value-type="float">
            <text:p>0,115849655683795</text:p>
          </table:table-cell>
          <table:table-cell table:style-name="ce69" office:value-type="float" office:value="4" calcext:value-type="float" table:number-columns-spanned="1" table:number-rows-spanned="16">
            <text:p>4</text:p>
          </table:table-cell>
          <table:table-cell table:style-name="ce69" office:value-type="float" office:value="3" calcext:value-type="float" table:number-columns-spanned="1" table:number-rows-spanned="16">
            <text:p>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825930060147747" calcext:value-type="float">
            <text:p>0,825930060147747</text:p>
          </table:table-cell>
          <table:table-cell table:style-name="ce78" office:value-type="float" office:value="0.892897362321889" calcext:value-type="float">
            <text:p>0,89289736232188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633597567353823" calcext:value-type="float">
            <text:p>0,633597567353823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594608228189588" calcext:value-type="float">
            <text:p>0,594608228189588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299549631906877" calcext:value-type="float">
            <text:p>2,99549631906877E-05</text:p>
          </table:table-cell>
          <table:table-cell table:style-name="ce78" office:value-type="float" office:value="0.000211446798993089" calcext:value-type="float">
            <text:p>0,00021144679899308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41767319840871" calcext:value-type="float">
            <text:p>0,41767319840871</text:p>
          </table:table-cell>
          <table:table-cell table:style-name="ce78" office:value-type="float" office:value="0.726388171145583" calcext:value-type="float">
            <text:p>0,72638817114558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503264983123689" calcext:value-type="float">
            <text:p>0,503264983123689</text:p>
          </table:table-cell>
          <table:table-cell table:style-name="ce78" office:value-type="float" office:value="0.778146660696064" calcext:value-type="float">
            <text:p>0,77814666069606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902008386283556" calcext:value-type="float">
            <text:p>0,902008386283556</text:p>
          </table:table-cell>
          <table:table-cell table:style-name="ce78" office:value-type="float" office:value="0.949482511877428" calcext:value-type="float">
            <text:p>0,949482511877428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642198533268118" calcext:value-type="float">
            <text:p>0,642198533268118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630683506980033" calcext:value-type="float">
            <text:p>0,630683506980033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199327373906846" calcext:value-type="float">
            <text:p>0,000199327373906846</text:p>
          </table:table-cell>
          <table:table-cell table:style-name="ce78" office:value-type="float" office:value="0.00113901356518198" calcext:value-type="float">
            <text:p>0,00113901356518198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0021520430068" calcext:value-type="float">
            <text:p>0,300021520430068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875158567601736" calcext:value-type="float">
            <text:p>8,75158567601736E-05</text:p>
          </table:table-cell>
          <table:table-cell table:style-name="ce78" office:value-type="float" office:value="0.000583439045067824" calcext:value-type="float">
            <text:p>0,00058343904506782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398952229217756" calcext:value-type="float">
            <text:p>0,398952229217756</text:p>
          </table:table-cell>
          <table:table-cell table:style-name="ce78" office:value-type="float" office:value="0.704033345678393" calcext:value-type="float">
            <text:p>0,70403334567839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691830495856748" calcext:value-type="float">
            <text:p>0,691830495856748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7" office:value-type="string" calcext:value-type="string">
            <text:p>MF_03_mean_score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80402050033955" calcext:value-type="float">
            <text:p>0,80402050033955</text:p>
          </table:table-cell>
          <table:table-cell table:style-name="ce79" office:value-type="float" office:value="0.885160183860055" calcext:value-type="float">
            <text:p>0,88516018386005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8" office:value-type="string" calcext:value-type="string">
            <text:p>CC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755176753587857" calcext:value-type="float">
            <text:p>0,755176753587857</text:p>
          </table:table-cell>
          <table:table-cell table:style-name="ce77" office:value-type="float" office:value="0.844526189952454" calcext:value-type="float">
            <text:p>0,844526189952454</text:p>
          </table:table-cell>
          <table:table-cell table:style-name="ce69" office:value-type="float" office:value="3" calcext:value-type="float" table:number-columns-spanned="1" table:number-rows-spanned="8">
            <text:p>3</text:p>
          </table:table-cell>
          <table:table-cell table:style-name="ce69" office:value-type="float" office:value="3" calcext:value-type="float" table:number-columns-spanned="1" table:number-rows-spanned="8">
            <text:p>3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491658887686264" calcext:value-type="float">
            <text:p>0,491658887686264</text:p>
          </table:table-cell>
          <table:table-cell table:style-name="ce78" office:value-type="float" office:value="0.776303506873049" calcext:value-type="float">
            <text:p>0,77630350687304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3038257597237" calcext:value-type="float">
            <text:p>0,3038257597237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144557152993098" calcext:value-type="float">
            <text:p>0,144557152993098</text:p>
          </table:table-cell>
          <table:table-cell table:style-name="ce78" office:value-type="float" office:value="0.340134477630819" calcext:value-type="float">
            <text:p>0,34013447763081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285980876915579" calcext:value-type="float">
            <text:p>2,85980876915579E-10</text:p>
          </table:table-cell>
          <table:table-cell table:style-name="ce78" office:value-type="float" office:value="0.00000000428971315373369" calcext:value-type="float">
            <text:p>4,28971315373369E-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284447777962169" calcext:value-type="float">
            <text:p>0,284447777962169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566969888472802" calcext:value-type="float">
            <text:p>0,00566969888472802</text:p>
          </table:table-cell>
          <table:table-cell table:style-name="ce78" office:value-type="float" office:value="0.0272145546466945" calcext:value-type="float">
            <text:p>0,027214554646694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10" office:value-type="string" calcext:value-type="string">
            <text:p>CC_03_mean_score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0000239483899276851" calcext:value-type="float">
            <text:p>2,39483899276851E-06</text:p>
          </table:table-cell>
          <table:table-cell table:style-name="ce79" office:value-type="float" office:value="0.0000205271913665872" calcext:value-type="float">
            <text:p>2,05271913665872E-0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2" office:value-type="string" calcext:value-type="string">
            <text:p>BP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654009754487684" calcext:value-type="float">
            <text:p>0,654009754487684</text:p>
          </table:table-cell>
          <table:table-cell table:style-name="ce77" office:value-type="float" office:value="0.840573326518175" calcext:value-type="float">
            <text:p>0,840573326518175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style-name="ce69" office:value-type="float" office:value="2" calcext:value-type="float" table:number-columns-spanned="1" table:number-rows-spanned="16">
            <text:p>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84581615643223" calcext:value-type="float">
            <text:p>0,0384581615643223</text:p>
          </table:table-cell>
          <table:table-cell table:style-name="ce78" office:value-type="float" office:value="0.109880461612349" calcext:value-type="float">
            <text:p>0,10988046161234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760073570957208" calcext:value-type="float">
            <text:p>0,760073570957208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6289232342948" calcext:value-type="float">
            <text:p>0,306289232342948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2.64675614503226E-017" calcext:value-type="float">
            <text:p>2,64675614503226E-17</text:p>
          </table:table-cell>
          <table:table-cell table:style-name="ce78" office:value-type="float" office:value="1.58805368701936E-015" calcext:value-type="float">
            <text:p>1,58805368701936E-1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304150076711426" calcext:value-type="float">
            <text:p>0,304150076711426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539794670134714" calcext:value-type="float">
            <text:p>0,539794670134714</text:p>
          </table:table-cell>
          <table:table-cell table:style-name="ce78" office:value-type="float" office:value="0.799695807606983" calcext:value-type="float">
            <text:p>0,79969580760698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144247803344663" calcext:value-type="float">
            <text:p>0,0144247803344663</text:p>
          </table:table-cell>
          <table:table-cell table:style-name="ce78" office:value-type="float" office:value="0.0596887462115847" calcext:value-type="float">
            <text:p>0,059688746211584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311419077029502" calcext:value-type="float">
            <text:p>0,311419077029502</text:p>
          </table:table-cell>
          <table:table-cell table:style-name="ce78" office:value-type="float" office:value="0.574927526823696" calcext:value-type="float">
            <text:p>0,57492752682369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25556387869713" calcext:value-type="float">
            <text:p>0,72555638786971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165195793284054" calcext:value-type="float">
            <text:p>0,0165195793284054</text:p>
          </table:table-cell>
          <table:table-cell table:style-name="ce78" office:value-type="float" office:value="0.0639467586906014" calcext:value-type="float">
            <text:p>0,063946758690601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846427151304018" calcext:value-type="float">
            <text:p>0,846427151304018</text:p>
          </table:table-cell>
          <table:table-cell table:style-name="ce78" office:value-type="float" office:value="0.898860691650285" calcext:value-type="float">
            <text:p>0,89886069165028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000119737928627593" calcext:value-type="float">
            <text:p>1,19737928627593E-09</text:p>
          </table:table-cell>
          <table:table-cell table:style-name="ce78" office:value-type="float" office:value="0.0000000159650571503457" calcext:value-type="float">
            <text:p>1,59650571503457E-08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647132946453214" calcext:value-type="float">
            <text:p>0,647132946453214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193000892076882" calcext:value-type="float">
            <text:p>0,193000892076882</text:p>
          </table:table-cell>
          <table:table-cell table:style-name="ce78" office:value-type="float" office:value="0.436983151872186" calcext:value-type="float">
            <text:p>0,43698315187218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4" office:value-type="string" calcext:value-type="string">
            <text:p>BP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952791995327172" calcext:value-type="float">
            <text:p>0,952791995327172</text:p>
          </table:table-cell>
          <table:table-cell table:style-name="ce79" office:value-type="float" office:value="0.956163692859243" calcext:value-type="float">
            <text:p>0,95616369285924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5" office:value-type="string" calcext:value-type="string">
            <text:p>MF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0466953931123369" calcext:value-type="float">
            <text:p>0,0466953931123369</text:p>
          </table:table-cell>
          <table:table-cell table:style-name="ce77" office:value-type="float" office:value="0.123991474749122" calcext:value-type="float">
            <text:p>0,123991474749122</text:p>
          </table:table-cell>
          <table:table-cell table:style-name="ce69" office:value-type="float" office:value="8" calcext:value-type="float" table:number-columns-spanned="1" table:number-rows-spanned="16">
            <text:p>8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294394800437265" calcext:value-type="float">
            <text:p>0,0294394800437265</text:p>
          </table:table-cell>
          <table:table-cell table:style-name="ce78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480561022741256" calcext:value-type="float">
            <text:p>0,480561022741256</text:p>
          </table:table-cell>
          <table:table-cell table:style-name="ce78" office:value-type="float" office:value="0.770641444440807" calcext:value-type="float">
            <text:p>0,7706414444408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518764440464043" calcext:value-type="float">
            <text:p>0,518764440464043</text:p>
          </table:table-cell>
          <table:table-cell table:style-name="ce78" office:value-type="float" office:value="0.778146660696064" calcext:value-type="float">
            <text:p>0,77814666069606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00567077045082056" calcext:value-type="float">
            <text:p>5,67077045082056E-12</text:p>
          </table:table-cell>
          <table:table-cell table:style-name="ce78" office:value-type="float" office:value="0.000000000136098490819693" calcext:value-type="float">
            <text:p>1,36098490819693E-10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103626817752368" calcext:value-type="float">
            <text:p>0,0103626817752368</text:p>
          </table:table-cell>
          <table:table-cell table:style-name="ce78" office:value-type="float" office:value="0.046056363445497" calcext:value-type="float">
            <text:p>0,04605636344549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747659333622127" calcext:value-type="float">
            <text:p>0,747659333622127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30954261712483" calcext:value-type="float">
            <text:p>0,730954261712483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451361844329704" calcext:value-type="float">
            <text:p>0,451361844329704</text:p>
          </table:table-cell>
          <table:table-cell table:style-name="ce78" office:value-type="float" office:value="0.752269740549506" calcext:value-type="float">
            <text:p>0,752269740549506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65844910577257" calcext:value-type="float">
            <text:p>0,65844910577257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154399733488566" calcext:value-type="float">
            <text:p>1,54399733488566E-08</text:p>
          </table:table-cell>
          <table:table-cell table:style-name="ce78" office:value-type="float" office:value="0.000000154399733488566" calcext:value-type="float">
            <text:p>1,54399733488566E-07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101969984233117" calcext:value-type="float">
            <text:p>0,101969984233117</text:p>
          </table:table-cell>
          <table:table-cell table:style-name="ce78" office:value-type="float" office:value="0.24472796215948" calcext:value-type="float">
            <text:p>0,24472796215948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00202294512025869" calcext:value-type="float">
            <text:p>2,02294512025869E-06</text:p>
          </table:table-cell>
          <table:table-cell table:style-name="ce78" office:value-type="float" office:value="0.0000186733395716187" calcext:value-type="float">
            <text:p>1,86733395716187E-0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353742260571521" calcext:value-type="float">
            <text:p>0,000353742260571521</text:p>
          </table:table-cell>
          <table:table-cell table:style-name="ce78" office:value-type="float" office:value="0.0018456117942862" calcext:value-type="float">
            <text:p>0,0018456117942862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648735885412574" calcext:value-type="float">
            <text:p>0,648735885412574</text:p>
          </table:table-cell>
          <table:table-cell table:style-name="ce78" office:value-type="float" office:value="0.840573326518175" calcext:value-type="float">
            <text:p>0,84057332651817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7" office:value-type="string" calcext:value-type="string">
            <text:p>MF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324864524401376" calcext:value-type="float">
            <text:p>0,0324864524401376</text:p>
          </table:table-cell>
          <table:table-cell table:style-name="ce79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8" office:value-type="string" calcext:value-type="string">
            <text:p>CC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25" office:value-type="string" calcext:value-type="string">
            <text:p>known</text:p>
          </table:table-cell>
          <table:table-cell table:style-name="ce77" office:value-type="float" office:value="0.377538784874239" calcext:value-type="float">
            <text:p>0,377538784874239</text:p>
          </table:table-cell>
          <table:table-cell table:style-name="ce77" office:value-type="float" office:value="0.676188868431473" calcext:value-type="float">
            <text:p>0,676188868431473</text:p>
          </table:table-cell>
          <table:table-cell table:style-name="ce69" office:value-type="float" office:value="4" calcext:value-type="float" table:number-columns-spanned="1" table:number-rows-spanned="8">
            <text:p>4</text:p>
          </table:table-cell>
          <table:table-cell table:style-name="ce69" office:value-type="float" office:value="2" calcext:value-type="float" table:number-columns-spanned="1" table:number-rows-spanned="8">
            <text:p>2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707753671880839" calcext:value-type="float">
            <text:p>0,0707753671880839</text:p>
          </table:table-cell>
          <table:table-cell table:style-name="ce78" office:value-type="float" office:value="0.17693841797021" calcext:value-type="float">
            <text:p>0,17693841797021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930631769090625" calcext:value-type="float">
            <text:p>0,930631769090625</text:p>
          </table:table-cell>
          <table:table-cell table:style-name="ce78" office:value-type="float" office:value="0.956163692859243" calcext:value-type="float">
            <text:p>0,956163692859243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717260253686097" calcext:value-type="float">
            <text:p>0,717260253686097</text:p>
          </table:table-cell>
          <table:table-cell table:style-name="ce78" office:value-type="float" office:value="0.844526189952454" calcext:value-type="float">
            <text:p>0,84452618995245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known</text:p>
          </table:table-cell>
          <table:table-cell table:style-name="ce78" office:value-type="float" office:value="0.000000000230516345633206" calcext:value-type="float">
            <text:p>2,30516345633206E-10</text:p>
          </table:table-cell>
          <table:table-cell table:style-name="ce78" office:value-type="float" office:value="0.00000000395170878228354" calcext:value-type="float">
            <text:p>3,95170878228354E-09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26" office:value-type="string" calcext:value-type="string">
            <text:p>unknown</text:p>
          </table:table-cell>
          <table:table-cell table:style-name="ce78" office:value-type="float" office:value="0.035761685969061" calcext:value-type="float">
            <text:p>0,035761685969061</text:p>
          </table:table-cell>
          <table:table-cell table:style-name="ce78" office:value-type="float" office:value="0.10466834917774" calcext:value-type="float">
            <text:p>0,10466834917774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26" office:value-type="string" calcext:value-type="string">
            <text:p>differences</text:p>
          </table:table-cell>
          <table:table-cell table:style-name="ce78" office:value-type="float" office:value="0.000115413433224258" calcext:value-type="float">
            <text:p>0,000115413433224258</text:p>
          </table:table-cell>
          <table:table-cell table:style-name="ce78" office:value-type="float" office:value="0.000728926946679525" calcext:value-type="float">
            <text:p>0,000728926946679525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 table:style-name="ce10" office:value-type="string" calcext:value-type="string">
            <text:p>CC_peptides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27" office:value-type="string" calcext:value-type="string">
            <text:p>differences</text:p>
          </table:table-cell>
          <table:table-cell table:style-name="ce79" office:value-type="float" office:value="0.0283763535075544" calcext:value-type="float">
            <text:p>0,0283763535075544</text:p>
          </table:table-cell>
          <table:table-cell table:style-name="ce79" office:value-type="float" office:value="0.0999583152004235" calcext:value-type="float">
            <text:p>0,0999583152004235</text:p>
          </table:table-cell>
          <table:covered-table-cell table:number-columns-repeated="2" table:style-name="ce1"/>
          <table:table-cell table:number-columns-repeated="7"/>
        </table:table-row>
        <table:table-row table:style-name="ro1" table:number-rows-repeated="1048454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eparate_families_count.D1:separate_families_count.E121 separate_families_count.K2:separate_families_count.L41">
            <calcext:condition calcext:apply-style-name="Good" calcext:value="&lt;0.05" calcext:base-cell-address="separate_families_count.D1"/>
          </calcext:conditional-format>
          <calcext:conditional-format calcext:target-range-address="separate_families_count.C1:separate_families_count.C1048576 separate_families_count.J2:separate_families_count.J41">
            <calcext:condition calcext:apply-style-name="Accent 2" calcext:value="contains-text(&quot;unknown&quot;)" calcext:base-cell-address="separate_families_count.C1"/>
          </calcext:conditional-format>
          <calcext:conditional-format calcext:target-range-address="separate_families_count.C1:separate_families_count.C1048576 separate_families_count.J2:separate_families_count.J41">
            <calcext:condition calcext:apply-style-name="Accent 1" calcext:value="contains-text(&quot;known&quot;)" calcext:base-cell-address="separate_families_count.C1"/>
          </calcext:conditional-format>
          <calcext:conditional-format calcext:target-range-address="separate_families_count.C1:separate_families_count.C1048576 separate_families_count.J2:separate_families_count.J41">
            <calcext:condition calcext:apply-style-name="Accent 3" calcext:value="contains-text(&quot;differences&quot;)" calcext:base-cell-address="separate_families_count.C1"/>
          </calcext:conditional-format>
        </calcext:conditional-formats>
      </table:table>
      <table:table table:name="separate_families_mean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ce40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35" office:value-type="string" calcext:value-type="string">
            <text:p>data_type</text:p>
          </table:table-cell>
          <table:table-cell table:style-name="ce88" office:value-type="string" calcext:value-type="string">
            <text:p>pvalue</text:p>
          </table:table-cell>
          <table:table-cell table:style-name="ce88" office:value-type="string" calcext:value-type="string">
            <text:p>pvalue_bh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significant_bh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P_all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179812461984512" calcext:value-type="float">
            <text:p>0,0179812461984512</text:p>
          </table:table-cell>
          <table:table-cell table:style-name="ce89" office:value-type="float" office:value="0.0714484517577635" calcext:value-type="float">
            <text:p>0,0714484517577635</text:p>
          </table:table-cell>
          <table:table-cell table:style-name="ce69" office:value-type="float" office:value="4" calcext:value-type="float" table:number-columns-spanned="1" table:number-rows-spanned="16">
            <text:p>4</text:p>
          </table:table-cell>
          <table:table-cell table:style-name="ce69" office:value-type="float" office:value="3" calcext:value-type="float" table:number-columns-spanned="1" table:number-rows-spanned="16">
            <text:p>3</text:p>
          </table:table-cell>
          <table:table-cell table:style-name="ce2" office:value-type="string" calcext:value-type="string">
            <text:p>BP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184575167040889" calcext:value-type="float">
            <text:p>0,0184575167040889</text:p>
          </table:table-cell>
          <table:table-cell table:style-name="ce89" office:value-type="float" office:value="0.0714484517577635" calcext:value-type="float">
            <text:p>0,0714484517577635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80186902755184" calcext:value-type="float">
            <text:p>0,280186902755184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69187638244409" calcext:value-type="float">
            <text:p>0,269187638244409</text:p>
          </table:table-cell>
          <table:table-cell table:style-name="ce90" office:value-type="float" office:value="0.466978171258641" calcext:value-type="float">
            <text:p>0,466978171258641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62821844939026" calcext:value-type="float">
            <text:p>0,262821844939026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58408205839451" calcext:value-type="float">
            <text:p>0,258408205839451</text:p>
          </table:table-cell>
          <table:table-cell table:style-name="ce90" office:value-type="float" office:value="0.466978171258641" calcext:value-type="float">
            <text:p>0,466978171258641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01311093484392" calcext:value-type="float">
            <text:p>0,201311093484392</text:p>
          </table:table-cell>
          <table:table-cell table:style-name="ce90" office:value-type="float" office:value="0.402622186968784" calcext:value-type="float">
            <text:p>0,402622186968784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67315592308485" calcext:value-type="float">
            <text:p>0,167315592308485</text:p>
          </table:table-cell>
          <table:table-cell table:style-name="ce90" office:value-type="float" office:value="0.36505220140033" calcext:value-type="float">
            <text:p>0,36505220140033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02289636991957" calcext:value-type="float">
            <text:p>0,00102289636991957</text:p>
          </table:table-cell>
          <table:table-cell table:style-name="ce90" office:value-type="float" office:value="0.00553512363991899" calcext:value-type="float">
            <text:p>0,00553512363991899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06089869765114" calcext:value-type="float">
            <text:p>0,00106089869765114</text:p>
          </table:table-cell>
          <table:table-cell table:style-name="ce90" office:value-type="float" office:value="0.00553512363991899" calcext:value-type="float">
            <text:p>0,00553512363991899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776912372515736" calcext:value-type="float">
            <text:p>0,776912372515736</text:p>
          </table:table-cell>
          <table:table-cell table:style-name="ce90" office:value-type="float" office:value="0.847540770017166" calcext:value-type="float">
            <text:p>0,847540770017166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8738967127613" calcext:value-type="float">
            <text:p>0,8738967127613</text:p>
          </table:table-cell>
          <table:table-cell table:style-name="ce90" office:value-type="float" office:value="0.912602845528551" calcext:value-type="float">
            <text:p>0,912602845528551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827678374334171" calcext:value-type="float">
            <text:p>0,827678374334171</text:p>
          </table:table-cell>
          <table:table-cell table:style-name="ce90" office:value-type="float" office:value="0.878950486018588" calcext:value-type="float">
            <text:p>0,878950486018588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710370460618504" calcext:value-type="float">
            <text:p>0,710370460618504</text:p>
          </table:table-cell>
          <table:table-cell table:style-name="ce90" office:value-type="float" office:value="0.804192974285099" calcext:value-type="float">
            <text:p>0,804192974285099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46258869110009" calcext:value-type="float">
            <text:p>0,146258869110009</text:p>
          </table:table-cell>
          <table:table-cell table:style-name="ce90" office:value-type="float" office:value="0.344138515552963" calcext:value-type="float">
            <text:p>0,344138515552963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25177282055078" calcext:value-type="float">
            <text:p>0,125177282055078</text:p>
          </table:table-cell>
          <table:table-cell table:style-name="ce90" office:value-type="float" office:value="0.306556609114476" calcext:value-type="float">
            <text:p>0,306556609114476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number-columns-repeated="2" table:style-name="ce90" office:value-type="float" office:value="0.996221293946145" calcext:value-type="float">
            <text:p>0,996221293946145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874577726964861" calcext:value-type="float">
            <text:p>0,874577726964861</text:p>
          </table:table-cell>
          <table:table-cell table:style-name="ce90" office:value-type="float" office:value="0.912602845528551" calcext:value-type="float">
            <text:p>0,912602845528551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9399692034582" calcext:value-type="float">
            <text:p>0,29399692034582</text:p>
          </table:table-cell>
          <table:table-cell table:style-name="ce90" office:value-type="float" office:value="0.470395072553312" calcext:value-type="float">
            <text:p>0,470395072553312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16190558432764" calcext:value-type="float">
            <text:p>0,516190558432764</text:p>
          </table:table-cell>
          <table:table-cell table:style-name="ce90" office:value-type="float" office:value="0.655207852440087" calcext:value-type="float">
            <text:p>0,655207852440087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52416628195207" calcext:value-type="float">
            <text:p>0,52416628195207</text:p>
          </table:table-cell>
          <table:table-cell table:style-name="ce90" office:value-type="float" office:value="0.655207852440087" calcext:value-type="float">
            <text:p>0,65520785244008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418777795949893" calcext:value-type="float">
            <text:p>0,418777795949893</text:p>
          </table:table-cell>
          <table:table-cell table:style-name="ce90" office:value-type="float" office:value="0.571060630840763" calcext:value-type="float">
            <text:p>0,571060630840763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76352407585644" calcext:value-type="float">
            <text:p>0,276352407585644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67056108989198" calcext:value-type="float">
            <text:p>0,167056108989198</text:p>
          </table:table-cell>
          <table:table-cell table:style-name="ce90" office:value-type="float" office:value="0.36505220140033" calcext:value-type="float">
            <text:p>0,36505220140033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1.73502996310522E-015" calcext:value-type="float">
            <text:p>1,73502996310522E-15</text:p>
          </table:table-cell>
          <table:table-cell table:style-name="ce90" office:value-type="float" office:value="0.000000000000104101797786313" calcext:value-type="float">
            <text:p>1,04101797786313E-13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0000149773200211179" calcext:value-type="float">
            <text:p>1,49773200211179E-12</text:p>
          </table:table-cell>
          <table:table-cell table:style-name="ce90" office:value-type="float" office:value="0.0000000000599092800844716" calcext:value-type="float">
            <text:p>5,99092800844716E-11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428450614469679" calcext:value-type="float">
            <text:p>4,28450614469679E-08</text:p>
          </table:table-cell>
          <table:table-cell table:style-name="ce90" office:value-type="float" office:value="0.000000642675921704518" calcext:value-type="float">
            <text:p>6,42675921704518E-07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0135248298265196" calcext:value-type="float">
            <text:p>1,35248298265196E-09</text:p>
          </table:table-cell>
          <table:table-cell table:style-name="ce90" office:value-type="float" office:value="0.0000000405744894795587" calcext:value-type="float">
            <text:p>4,05744894795587E-08</text:p>
          </table:table-cell>
        </table:table-row>
        <table:table-row table:style-name="ro1">
          <table:table-cell table:style-name="ce3" office:value-type="string" calcext:value-type="string">
            <text:p>BP_all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983161038037025" calcext:value-type="float">
            <text:p>0,983161038037025</text:p>
          </table:table-cell>
          <table:table-cell table:style-name="ce90" office:value-type="float" office:value="0.996221293946145" calcext:value-type="float">
            <text:p>0,996221293946145</text:p>
          </table:table-cell>
          <table:covered-table-cell table:number-columns-repeated="2" table:style-name="ce1"/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324086017035409" calcext:value-type="float">
            <text:p>0,324086017035409</text:p>
          </table:table-cell>
          <table:table-cell table:style-name="ce90" office:value-type="float" office:value="0.479248393886445" calcext:value-type="float">
            <text:p>0,479248393886445</text:p>
          </table:table-cell>
        </table:table-row>
        <table:table-row table:style-name="ro1">
          <table:table-cell table:style-name="ce4" office:value-type="string" calcext:value-type="string">
            <text:p>BP_all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315296150385135" calcext:value-type="float">
            <text:p>0,315296150385135</text:p>
          </table:table-cell>
          <table:table-cell table:style-name="ce91" office:value-type="float" office:value="0.479248393886445" calcext:value-type="float">
            <text:p>0,479248393886445</text:p>
          </table:table-cell>
          <table:covered-table-cell table:number-columns-repeated="2" table:style-name="ce1"/>
          <table:table-cell table:style-name="ce4" office:value-type="string" calcext:value-type="string">
            <text:p>BP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275106199987906" calcext:value-type="float">
            <text:p>0,275106199987906</text:p>
          </table:table-cell>
          <table:table-cell table:style-name="ce91" office:value-type="float" office:value="0.466978171258641" calcext:value-type="float">
            <text:p>0,466978171258641</text:p>
          </table:table-cell>
        </table:table-row>
        <table:table-row table:style-name="ro1">
          <table:table-cell table:style-name="ce5" office:value-type="string" calcext:value-type="string">
            <text:p>MF_all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000529165984503524" calcext:value-type="float">
            <text:p>5,29165984503524E-05</text:p>
          </table:table-cell>
          <table:table-cell table:style-name="ce89" office:value-type="float" office:value="0.000425262909684862" calcext:value-type="float">
            <text:p>0,000425262909684862</text:p>
          </table:table-cell>
          <table:table-cell table:style-name="ce69" office:value-type="float" office:value="7" calcext:value-type="float" table:number-columns-spanned="1" table:number-rows-spanned="16">
            <text:p>7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style-name="ce5" office:value-type="string" calcext:value-type="string">
            <text:p>MF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000531578637106078" calcext:value-type="float">
            <text:p>5,31578637106078E-05</text:p>
          </table:table-cell>
          <table:table-cell table:style-name="ce89" office:value-type="float" office:value="0.000425262909684862" calcext:value-type="float">
            <text:p>0,000425262909684862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239427714077785" calcext:value-type="float">
            <text:p>0,0239427714077785</text:p>
          </table:table-cell>
          <table:table-cell table:style-name="ce90" office:value-type="float" office:value="0.0870646233010129" calcext:value-type="float">
            <text:p>0,0870646233010129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248755293913074" calcext:value-type="float">
            <text:p>0,0248755293913074</text:p>
          </table:table-cell>
          <table:table-cell table:style-name="ce90" office:value-type="float" office:value="0.0877959860869672" calcext:value-type="float">
            <text:p>0,0877959860869672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640046393429482" calcext:value-type="float">
            <text:p>0,640046393429482</text:p>
          </table:table-cell>
          <table:table-cell table:style-name="ce90" office:value-type="float" office:value="0.751053957154334" calcext:value-type="float">
            <text:p>0,751053957154334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686175782578081" calcext:value-type="float">
            <text:p>0,686175782578081</text:p>
          </table:table-cell>
          <table:table-cell table:style-name="ce90" office:value-type="float" office:value="0.784200894374949" calcext:value-type="float">
            <text:p>0,784200894374949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84870940600897" calcext:value-type="float">
            <text:p>0,284870940600897</text:p>
          </table:table-cell>
          <table:table-cell table:style-name="ce90" office:value-type="float" office:value="0.46828099824805" calcext:value-type="float">
            <text:p>0,4682809982480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53983939113489" calcext:value-type="float">
            <text:p>0,553983939113489</text:p>
          </table:table-cell>
          <table:table-cell table:style-name="ce90" office:value-type="float" office:value="0.671495683773926" calcext:value-type="float">
            <text:p>0,671495683773926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0295012549942308" calcext:value-type="float">
            <text:p>0,000295012549942308</text:p>
          </table:table-cell>
          <table:table-cell table:style-name="ce90" office:value-type="float" office:value="0.00186323715753037" calcext:value-type="float">
            <text:p>0,00186323715753037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027403660855266" calcext:value-type="float">
            <text:p>0,00027403660855266</text:p>
          </table:table-cell>
          <table:table-cell table:style-name="ce90" office:value-type="float" office:value="0.0018269107236844" calcext:value-type="float">
            <text:p>0,0018269107236844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64649177364746" calcext:value-type="float">
            <text:p>0,264649177364746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22685658564476" calcext:value-type="float">
            <text:p>0,122685658564476</text:p>
          </table:table-cell>
          <table:table-cell table:style-name="ce90" office:value-type="float" office:value="0.306556609114476" calcext:value-type="float">
            <text:p>0,306556609114476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101143169170941" calcext:value-type="float">
            <text:p>0,101143169170941</text:p>
          </table:table-cell>
          <table:table-cell table:style-name="ce90" office:value-type="float" office:value="0.260845085477456" calcext:value-type="float">
            <text:p>0,260845085477456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785667360284261" calcext:value-type="float">
            <text:p>0,0785667360284261</text:p>
          </table:table-cell>
          <table:table-cell table:style-name="ce90" office:value-type="float" office:value="0.214272916441162" calcext:value-type="float">
            <text:p>0,214272916441162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02164325145337" calcext:value-type="float">
            <text:p>0,102164325145337</text:p>
          </table:table-cell>
          <table:table-cell table:style-name="ce90" office:value-type="float" office:value="0.260845085477456" calcext:value-type="float">
            <text:p>0,260845085477456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56624556209996" calcext:value-type="float">
            <text:p>0,156624556209996</text:p>
          </table:table-cell>
          <table:table-cell table:style-name="ce90" office:value-type="float" office:value="0.361441283561528" calcext:value-type="float">
            <text:p>0,361441283561528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342242147773793" calcext:value-type="float">
            <text:p>0,342242147773793</text:p>
          </table:table-cell>
          <table:table-cell table:style-name="ce90" office:value-type="float" office:value="0.488917353962562" calcext:value-type="float">
            <text:p>0,48891735396256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30119961892347" calcext:value-type="float">
            <text:p>0,30119961892347</text:p>
          </table:table-cell>
          <table:table-cell table:style-name="ce90" office:value-type="float" office:value="0.475578345668637" calcext:value-type="float">
            <text:p>0,475578345668637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417135508651821" calcext:value-type="float">
            <text:p>0,417135508651821</text:p>
          </table:table-cell>
          <table:table-cell table:style-name="ce90" office:value-type="float" office:value="0.571060630840763" calcext:value-type="float">
            <text:p>0,571060630840763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64465464655747" calcext:value-type="float">
            <text:p>0,64465464655747</text:p>
          </table:table-cell>
          <table:table-cell table:style-name="ce90" office:value-type="float" office:value="0.751053957154334" calcext:value-type="float">
            <text:p>0,751053957154334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415832417751953" calcext:value-type="float">
            <text:p>0,0415832417751953</text:p>
          </table:table-cell>
          <table:table-cell table:style-name="ce90" office:value-type="float" office:value="0.131315500342722" calcext:value-type="float">
            <text:p>0,13131550034272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370587219952283" calcext:value-type="float">
            <text:p>0,0370587219952283</text:p>
          </table:table-cell>
          <table:table-cell table:style-name="ce90" office:value-type="float" office:value="0.123529073317428" calcext:value-type="float">
            <text:p>0,123529073317428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925220007557993" calcext:value-type="float">
            <text:p>0,925220007557993</text:p>
          </table:table-cell>
          <table:table-cell table:style-name="ce90" office:value-type="float" office:value="0.957124145749648" calcext:value-type="float">
            <text:p>0,957124145749648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40799451356184" calcext:value-type="float">
            <text:p>0,540799451356184</text:p>
          </table:table-cell>
          <table:table-cell table:style-name="ce90" office:value-type="float" office:value="0.66547257108214" calcext:value-type="float">
            <text:p>0,66547257108214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0406239391268576" calcext:value-type="float">
            <text:p>4,06239391268576E-09</text:p>
          </table:table-cell>
          <table:table-cell table:style-name="ce90" office:value-type="float" office:value="0.0000000974974539044583" calcext:value-type="float">
            <text:p>9,74974539044583E-08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808268660606384" calcext:value-type="float">
            <text:p>8,08268660606384E-08</text:p>
          </table:table-cell>
          <table:table-cell table:style-name="ce90" office:value-type="float" office:value="0.00000107769154747518" calcext:value-type="float">
            <text:p>1,07769154747518E-06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398006956978484" calcext:value-type="float">
            <text:p>3,98006956978484E-06</text:p>
          </table:table-cell>
          <table:table-cell table:style-name="ce90" office:value-type="float" office:value="0.0000477608348374181" calcext:value-type="float">
            <text:p>4,77608348374181E-05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643927140066581" calcext:value-type="float">
            <text:p>6,43927140066581E-05</text:p>
          </table:table-cell>
          <table:table-cell table:style-name="ce90" office:value-type="float" office:value="0.000482945355049936" calcext:value-type="float">
            <text:p>0,000482945355049936</text:p>
          </table:table-cell>
        </table:table-row>
        <table:table-row table:style-name="ro1">
          <table:table-cell table:style-name="ce6" office:value-type="string" calcext:value-type="string">
            <text:p>MF_all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429435882041471" calcext:value-type="float">
            <text:p>0,00429435882041471</text:p>
          </table:table-cell>
          <table:table-cell table:style-name="ce90" office:value-type="float" office:value="0.0190860392018432" calcext:value-type="float">
            <text:p>0,0190860392018432</text:p>
          </table:table-cell>
          <table:covered-table-cell table:number-columns-repeated="2" table:style-name="ce1"/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404352281064466" calcext:value-type="float">
            <text:p>0,00404352281064466</text:p>
          </table:table-cell>
          <table:table-cell table:style-name="ce90" office:value-type="float" office:value="0.0186624129722061" calcext:value-type="float">
            <text:p>0,0186624129722061</text:p>
          </table:table-cell>
        </table:table-row>
        <table:table-row table:style-name="ro1">
          <table:table-cell table:style-name="ce7" office:value-type="string" calcext:value-type="string">
            <text:p>MF_all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0698786756075409" calcext:value-type="float">
            <text:p>0,0698786756075409</text:p>
          </table:table-cell>
          <table:table-cell table:style-name="ce91" office:value-type="float" office:value="0.195010257509416" calcext:value-type="float">
            <text:p>0,195010257509416</text:p>
          </table:table-cell>
          <table:covered-table-cell table:number-columns-repeated="2" table:style-name="ce1"/>
          <table:table-cell table:style-name="ce7" office:value-type="string" calcext:value-type="string">
            <text:p>MF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192181459204939" calcext:value-type="float">
            <text:p>0,192181459204939</text:p>
          </table:table-cell>
          <table:table-cell table:style-name="ce91" office:value-type="float" office:value="0.397616812148149" calcext:value-type="float">
            <text:p>0,397616812148149</text:p>
          </table:table-cell>
        </table:table-row>
        <table:table-row table:style-name="ro1">
          <table:table-cell table:style-name="ce8" office:value-type="string" calcext:value-type="string">
            <text:p>CC_all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327486402489071" calcext:value-type="float">
            <text:p>0,327486402489071</text:p>
          </table:table-cell>
          <table:table-cell table:style-name="ce89" office:value-type="float" office:value="0.479248393886445" calcext:value-type="float">
            <text:p>0,479248393886445</text:p>
          </table:table-cell>
          <table:table-cell table:style-name="ce69" office:value-type="float" office:value="4" calcext:value-type="float" table:number-columns-spanned="1" table:number-rows-spanned="8">
            <text:p>4</text:p>
          </table:table-cell>
          <table:table-cell table:style-name="ce69" office:value-type="float" office:value="3" calcext:value-type="float" table:number-columns-spanned="1" table:number-rows-spanned="8">
            <text:p>3</text:p>
          </table:table-cell>
          <table:table-cell table:style-name="ce33" office:value-type="string" calcext:value-type="string">
            <text:p>CC_peptides</text:p>
          </table:table-cell>
          <table:table-cell table:style-name="ce34" office:value-type="string" calcext:value-type="string">
            <text:p>mean_comparison</text:p>
          </table:table-cell>
          <table:table-cell table:style-name="ce39" office:value-type="string" calcext:value-type="string">
            <text:p>known</text:p>
          </table:table-cell>
          <table:table-cell table:style-name="ce45" office:value-type="float" office:value="0.322437343092722" calcext:value-type="float">
            <text:p>0,322437343092722</text:p>
          </table:table-cell>
          <table:table-cell table:style-name="ce45" office:value-type="float" office:value="0.479248393886445" calcext:value-type="float">
            <text:p>0,479248393886445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536725718505117" calcext:value-type="float">
            <text:p>0,0536725718505117</text:p>
          </table:table-cell>
          <table:table-cell table:style-name="ce90" office:value-type="float" office:value="0.165146374924651" calcext:value-type="float">
            <text:p>0,165146374924651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553493705451823" calcext:value-type="float">
            <text:p>0,0553493705451823</text:p>
          </table:table-cell>
          <table:table-cell table:style-name="ce90" office:value-type="float" office:value="0.166048111635547" calcext:value-type="float">
            <text:p>0,166048111635547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08418300828744" calcext:value-type="float">
            <text:p>0,208418300828744</text:p>
          </table:table-cell>
          <table:table-cell table:style-name="ce90" office:value-type="float" office:value="0.41000321474507" calcext:value-type="float">
            <text:p>0,41000321474507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28404892194511" calcext:value-type="float">
            <text:p>0,228404892194511</text:p>
          </table:table-cell>
          <table:table-cell table:style-name="ce90" office:value-type="float" office:value="0.442073984892601" calcext:value-type="float">
            <text:p>0,442073984892601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769606855036851" calcext:value-type="float">
            <text:p>0,769606855036851</text:p>
          </table:table-cell>
          <table:table-cell table:style-name="ce90" office:value-type="float" office:value="0.847540770017166" calcext:value-type="float">
            <text:p>0,847540770017166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823876905969364" calcext:value-type="float">
            <text:p>0,823876905969364</text:p>
          </table:table-cell>
          <table:table-cell table:style-name="ce90" office:value-type="float" office:value="0.878950486018588" calcext:value-type="float">
            <text:p>0,878950486018588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60280064481487" calcext:value-type="float">
            <text:p>0,00160280064481487</text:p>
          </table:table-cell>
          <table:table-cell table:style-name="ce90" office:value-type="float" office:value="0.00801400322407436" calcext:value-type="float">
            <text:p>0,00801400322407436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05753882643215" calcext:value-type="float">
            <text:p>0,00105753882643215</text:p>
          </table:table-cell>
          <table:table-cell table:style-name="ce90" office:value-type="float" office:value="0.00553512363991899" calcext:value-type="float">
            <text:p>0,00553512363991899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215643158045918" calcext:value-type="float">
            <text:p>0,0215643158045918</text:p>
          </table:table-cell>
          <table:table-cell table:style-name="ce90" office:value-type="float" office:value="0.0808661842672193" calcext:value-type="float">
            <text:p>0,0808661842672193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257054860460325" calcext:value-type="float">
            <text:p>0,0257054860460325</text:p>
          </table:table-cell>
          <table:table-cell table:style-name="ce90" office:value-type="float" office:value="0.0881330950149687" calcext:value-type="float">
            <text:p>0,0881330950149687</text:p>
          </table:table-cell>
        </table:table-row>
        <table:table-row table:style-name="ro1">
          <table:table-cell table:style-name="ce9" office:value-type="string" calcext:value-type="string">
            <text:p>CC_all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358681633200551" calcext:value-type="float">
            <text:p>0,00358681633200551</text:p>
          </table:table-cell>
          <table:table-cell table:style-name="ce90" office:value-type="float" office:value="0.0172167183936264" calcext:value-type="float">
            <text:p>0,0172167183936264</text:p>
          </table:table-cell>
          <table:covered-table-cell table:number-columns-repeated="2" table:style-name="ce1"/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138529600943362" calcext:value-type="float">
            <text:p>0,000138529600943362</text:p>
          </table:table-cell>
          <table:table-cell table:style-name="ce90" office:value-type="float" office:value="0.000977856006659027" calcext:value-type="float">
            <text:p>0,000977856006659027</text:p>
          </table:table-cell>
        </table:table-row>
        <table:table-row table:style-name="ro1">
          <table:table-cell table:style-name="ce10" office:value-type="string" calcext:value-type="string">
            <text:p>CC_all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0000185446502089236" calcext:value-type="float">
            <text:p>1,85446502089236E-05</text:p>
          </table:table-cell>
          <table:table-cell table:style-name="ce91" office:value-type="float" office:value="0.00020230527500644" calcext:value-type="float">
            <text:p>0,00020230527500644</text:p>
          </table:table-cell>
          <table:covered-table-cell table:number-columns-repeated="2" table:style-name="ce1"/>
          <table:table-cell table:style-name="ce10" office:value-type="string" calcext:value-type="string">
            <text:p>CC_peptides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000026569289494861" calcext:value-type="float">
            <text:p>2,6569289494861E-05</text:p>
          </table:table-cell>
          <table:table-cell table:style-name="ce91" office:value-type="float" office:value="0.00026569289494861" calcext:value-type="float">
            <text:p>0,00026569289494861</text:p>
          </table:table-cell>
        </table:table-row>
        <table:table-row table:style-name="ro1">
          <table:table-cell table:style-name="ce2" office:value-type="string" calcext:value-type="string">
            <text:p>BP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179812461984512" calcext:value-type="float">
            <text:p>0,0179812461984512</text:p>
          </table:table-cell>
          <table:table-cell table:style-name="ce89" office:value-type="float" office:value="0.0714484517577635" calcext:value-type="float">
            <text:p>0,0714484517577635</text:p>
          </table:table-cell>
          <table:table-cell table:style-name="ce69" office:value-type="float" office:value="4" calcext:value-type="float" table:number-columns-spanned="1" table:number-rows-spanned="16">
            <text:p>4</text:p>
          </table:table-cell>
          <table:table-cell table:style-name="ce69" office:value-type="float" office:value="3" calcext:value-type="float" table:number-columns-spanned="1" table:number-rows-spanned="16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80186902755184" calcext:value-type="float">
            <text:p>0,280186902755184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62821844939026" calcext:value-type="float">
            <text:p>0,262821844939026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01311093484392" calcext:value-type="float">
            <text:p>0,201311093484392</text:p>
          </table:table-cell>
          <table:table-cell table:style-name="ce90" office:value-type="float" office:value="0.402622186968784" calcext:value-type="float">
            <text:p>0,40262218696878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02289636991957" calcext:value-type="float">
            <text:p>0,00102289636991957</text:p>
          </table:table-cell>
          <table:table-cell table:style-name="ce90" office:value-type="float" office:value="0.00553512363991899" calcext:value-type="float">
            <text:p>0,0055351236399189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776912372515736" calcext:value-type="float">
            <text:p>0,776912372515736</text:p>
          </table:table-cell>
          <table:table-cell table:style-name="ce90" office:value-type="float" office:value="0.847540770017166" calcext:value-type="float">
            <text:p>0,84754077001716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827678374334171" calcext:value-type="float">
            <text:p>0,827678374334171</text:p>
          </table:table-cell>
          <table:table-cell table:style-name="ce90" office:value-type="float" office:value="0.878950486018588" calcext:value-type="float">
            <text:p>0,87895048601858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46258869110009" calcext:value-type="float">
            <text:p>0,146258869110009</text:p>
          </table:table-cell>
          <table:table-cell table:style-name="ce90" office:value-type="float" office:value="0.344138515552963" calcext:value-type="float">
            <text:p>0,34413851555296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number-columns-repeated="2" table:style-name="ce90" office:value-type="float" office:value="0.996221293946145" calcext:value-type="float">
            <text:p>0,996221293946145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9399692034582" calcext:value-type="float">
            <text:p>0,29399692034582</text:p>
          </table:table-cell>
          <table:table-cell table:style-name="ce90" office:value-type="float" office:value="0.470395072553312" calcext:value-type="float">
            <text:p>0,470395072553312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52416628195207" calcext:value-type="float">
            <text:p>0,52416628195207</text:p>
          </table:table-cell>
          <table:table-cell table:style-name="ce90" office:value-type="float" office:value="0.655207852440087" calcext:value-type="float">
            <text:p>0,65520785244008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76352407585644" calcext:value-type="float">
            <text:p>0,276352407585644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1.73502996310522E-015" calcext:value-type="float">
            <text:p>1,73502996310522E-15</text:p>
          </table:table-cell>
          <table:table-cell table:style-name="ce90" office:value-type="float" office:value="0.000000000000104101797786313" calcext:value-type="float">
            <text:p>1,04101797786313E-1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428450614469679" calcext:value-type="float">
            <text:p>4,28450614469679E-08</text:p>
          </table:table-cell>
          <table:table-cell table:style-name="ce90" office:value-type="float" office:value="0.000000642675921704518" calcext:value-type="float">
            <text:p>6,42675921704518E-0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03_mean_score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983161038037025" calcext:value-type="float">
            <text:p>0,983161038037025</text:p>
          </table:table-cell>
          <table:table-cell table:style-name="ce90" office:value-type="float" office:value="0.996221293946145" calcext:value-type="float">
            <text:p>0,996221293946145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4" office:value-type="string" calcext:value-type="string">
            <text:p>BP_03_mean_score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315296150385135" calcext:value-type="float">
            <text:p>0,315296150385135</text:p>
          </table:table-cell>
          <table:table-cell table:style-name="ce91" office:value-type="float" office:value="0.479248393886445" calcext:value-type="float">
            <text:p>0,479248393886445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5" office:value-type="string" calcext:value-type="string">
            <text:p>MF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175533624244167" calcext:value-type="float">
            <text:p>0,0175533624244167</text:p>
          </table:table-cell>
          <table:table-cell table:style-name="ce89" office:value-type="float" office:value="0.0714484517577635" calcext:value-type="float">
            <text:p>0,0714484517577635</text:p>
          </table:table-cell>
          <table:table-cell table:style-name="ce69" office:value-type="float" office:value="4" calcext:value-type="float" table:number-columns-spanned="1" table:number-rows-spanned="16">
            <text:p>4</text:p>
          </table:table-cell>
          <table:table-cell table:style-name="ce69" office:value-type="float" office:value="2" calcext:value-type="float" table:number-columns-spanned="1" table:number-rows-spanned="16">
            <text:p>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318224061973578" calcext:value-type="float">
            <text:p>0,318224061973578</text:p>
          </table:table-cell>
          <table:table-cell table:style-name="ce90" office:value-type="float" office:value="0.479248393886445" calcext:value-type="float">
            <text:p>0,479248393886445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172639994588215" calcext:value-type="float">
            <text:p>0,172639994588215</text:p>
          </table:table-cell>
          <table:table-cell table:style-name="ce90" office:value-type="float" office:value="0.369942845546174" calcext:value-type="float">
            <text:p>0,36994284554617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408205648242655" calcext:value-type="float">
            <text:p>0,408205648242655</text:p>
          </table:table-cell>
          <table:table-cell table:style-name="ce90" office:value-type="float" office:value="0.569589276617658" calcext:value-type="float">
            <text:p>0,56958927661765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178101685311236" calcext:value-type="float">
            <text:p>0,178101685311236</text:p>
          </table:table-cell>
          <table:table-cell table:style-name="ce90" office:value-type="float" office:value="0.374950916444708" calcext:value-type="float">
            <text:p>0,37495091644470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61654046793118" calcext:value-type="float">
            <text:p>0,161654046793118</text:p>
          </table:table-cell>
          <table:table-cell table:style-name="ce90" office:value-type="float" office:value="0.36505220140033" calcext:value-type="float">
            <text:p>0,3650522014003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431569362733723" calcext:value-type="float">
            <text:p>0,431569362733723</text:p>
          </table:table-cell>
          <table:table-cell table:style-name="ce90" office:value-type="float" office:value="0.571772527630978" calcext:value-type="float">
            <text:p>0,57177252763097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433594166786825" calcext:value-type="float">
            <text:p>0,433594166786825</text:p>
          </table:table-cell>
          <table:table-cell table:style-name="ce90" office:value-type="float" office:value="0.571772527630978" calcext:value-type="float">
            <text:p>0,57177252763097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637270926939221" calcext:value-type="float">
            <text:p>0,0637270926939221</text:p>
          </table:table-cell>
          <table:table-cell table:style-name="ce90" office:value-type="float" office:value="0.185501446072829" calcext:value-type="float">
            <text:p>0,18550144607282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427220777522484" calcext:value-type="float">
            <text:p>0,427220777522484</text:p>
          </table:table-cell>
          <table:table-cell table:style-name="ce90" office:value-type="float" office:value="0.571772527630978" calcext:value-type="float">
            <text:p>0,57177252763097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745279326205992" calcext:value-type="float">
            <text:p>0,745279326205992</text:p>
          </table:table-cell>
          <table:table-cell table:style-name="ce90" office:value-type="float" office:value="0.835827281726346" calcext:value-type="float">
            <text:p>0,83582728172634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637461406301699" calcext:value-type="float">
            <text:p>0,637461406301699</text:p>
          </table:table-cell>
          <table:table-cell table:style-name="ce90" office:value-type="float" office:value="0.751053957154334" calcext:value-type="float">
            <text:p>0,75105395715433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337142533374542" calcext:value-type="float">
            <text:p>3,37142533374542E-08</text:p>
          </table:table-cell>
          <table:table-cell table:style-name="ce90" office:value-type="float" office:value="0.000000642675921704518" calcext:value-type="float">
            <text:p>6,42675921704518E-0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398336703815527" calcext:value-type="float">
            <text:p>0,0398336703815527</text:p>
          </table:table-cell>
          <table:table-cell table:style-name="ce90" office:value-type="float" office:value="0.129190282318549" calcext:value-type="float">
            <text:p>0,12919028231854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03_mean_score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442583849206192" calcext:value-type="float">
            <text:p>4,42583849206192E-05</text:p>
          </table:table-cell>
          <table:table-cell table:style-name="ce90" office:value-type="float" office:value="0.000408538937728793" calcext:value-type="float">
            <text:p>0,00040853893772879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7" office:value-type="string" calcext:value-type="string">
            <text:p>MF_03_mean_score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06492550612549" calcext:value-type="float">
            <text:p>0,06492550612549</text:p>
          </table:table-cell>
          <table:table-cell table:style-name="ce91" office:value-type="float" office:value="0.185501446072829" calcext:value-type="float">
            <text:p>0,18550144607282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8" office:value-type="string" calcext:value-type="string">
            <text:p>CC_03_mean_score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460868470104178" calcext:value-type="float">
            <text:p>0,460868470104178</text:p>
          </table:table-cell>
          <table:table-cell table:style-name="ce89" office:value-type="float" office:value="0.59466899368281" calcext:value-type="float">
            <text:p>0,59466899368281</text:p>
          </table:table-cell>
          <table:table-cell table:style-name="ce69" office:value-type="float" office:value="0" calcext:value-type="float" table:number-columns-spanned="1" table:number-rows-spanned="8">
            <text:p>0</text:p>
          </table:table-cell>
          <table:table-cell table:style-name="ce69" office:value-type="float" office:value="0" calcext:value-type="float" table:number-columns-spanned="1" table:number-rows-spanned="8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360470651731439" calcext:value-type="float">
            <text:p>0,360470651731439</text:p>
          </table:table-cell>
          <table:table-cell table:style-name="ce90" office:value-type="float" office:value="0.508899743620856" calcext:value-type="float">
            <text:p>0,50889974362085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543469266383747" calcext:value-type="float">
            <text:p>0,543469266383747</text:p>
          </table:table-cell>
          <table:table-cell table:style-name="ce90" office:value-type="float" office:value="0.66547257108214" calcext:value-type="float">
            <text:p>0,6654725710821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72242220553" calcext:value-type="float">
            <text:p>0,572242220553</text:p>
          </table:table-cell>
          <table:table-cell table:style-name="ce90" office:value-type="float" office:value="0.6866906646636" calcext:value-type="float">
            <text:p>0,686690664663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836905875532106" calcext:value-type="float">
            <text:p>0,0836905875532106</text:p>
          </table:table-cell>
          <table:table-cell table:style-name="ce90" office:value-type="float" office:value="0.223174900141895" calcext:value-type="float">
            <text:p>0,223174900141895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45775725627943" calcext:value-type="float">
            <text:p>0,45775725627943</text:p>
          </table:table-cell>
          <table:table-cell table:style-name="ce90" office:value-type="float" office:value="0.59466899368281" calcext:value-type="float">
            <text:p>0,5946689936828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03_mean_score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341008563304897" calcext:value-type="float">
            <text:p>0,341008563304897</text:p>
          </table:table-cell>
          <table:table-cell table:style-name="ce90" office:value-type="float" office:value="0.488917353962562" calcext:value-type="float">
            <text:p>0,488917353962562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10" office:value-type="string" calcext:value-type="string">
            <text:p>CC_03_mean_score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671358069553448" calcext:value-type="float">
            <text:p>0,671358069553448</text:p>
          </table:table-cell>
          <table:table-cell table:style-name="ce91" office:value-type="float" office:value="0.774643926407824" calcext:value-type="float">
            <text:p>0,77464392640782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BP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184575167040889" calcext:value-type="float">
            <text:p>0,0184575167040889</text:p>
          </table:table-cell>
          <table:table-cell table:style-name="ce89" office:value-type="float" office:value="0.0714484517577635" calcext:value-type="float">
            <text:p>0,0714484517577635</text:p>
          </table:table-cell>
          <table:table-cell table:style-name="ce69" office:value-type="float" office:value="4" calcext:value-type="float" table:number-columns-spanned="1" table:number-rows-spanned="16">
            <text:p>4</text:p>
          </table:table-cell>
          <table:table-cell table:style-name="ce69" office:value-type="float" office:value="3" calcext:value-type="float" table:number-columns-spanned="1" table:number-rows-spanned="16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269187638244409" calcext:value-type="float">
            <text:p>0,269187638244409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58408205839451" calcext:value-type="float">
            <text:p>0,258408205839451</text:p>
          </table:table-cell>
          <table:table-cell table:style-name="ce90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67315592308485" calcext:value-type="float">
            <text:p>0,167315592308485</text:p>
          </table:table-cell>
          <table:table-cell table:style-name="ce90" office:value-type="float" office:value="0.36505220140033" calcext:value-type="float">
            <text:p>0,3650522014003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06089869765114" calcext:value-type="float">
            <text:p>0,00106089869765114</text:p>
          </table:table-cell>
          <table:table-cell table:style-name="ce90" office:value-type="float" office:value="0.00553512363991899" calcext:value-type="float">
            <text:p>0,0055351236399189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8738967127613" calcext:value-type="float">
            <text:p>0,8738967127613</text:p>
          </table:table-cell>
          <table:table-cell table:style-name="ce90" office:value-type="float" office:value="0.912602845528551" calcext:value-type="float">
            <text:p>0,91260284552855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710370460618504" calcext:value-type="float">
            <text:p>0,710370460618504</text:p>
          </table:table-cell>
          <table:table-cell table:style-name="ce90" office:value-type="float" office:value="0.804192974285099" calcext:value-type="float">
            <text:p>0,80419297428509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25177282055078" calcext:value-type="float">
            <text:p>0,125177282055078</text:p>
          </table:table-cell>
          <table:table-cell table:style-name="ce90" office:value-type="float" office:value="0.306556609114476" calcext:value-type="float">
            <text:p>0,30655660911447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874577726964861" calcext:value-type="float">
            <text:p>0,874577726964861</text:p>
          </table:table-cell>
          <table:table-cell table:style-name="ce90" office:value-type="float" office:value="0.912602845528551" calcext:value-type="float">
            <text:p>0,91260284552855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16190558432764" calcext:value-type="float">
            <text:p>0,516190558432764</text:p>
          </table:table-cell>
          <table:table-cell table:style-name="ce90" office:value-type="float" office:value="0.655207852440087" calcext:value-type="float">
            <text:p>0,65520785244008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418777795949893" calcext:value-type="float">
            <text:p>0,418777795949893</text:p>
          </table:table-cell>
          <table:table-cell table:style-name="ce90" office:value-type="float" office:value="0.571060630840763" calcext:value-type="float">
            <text:p>0,57106063084076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67056108989198" calcext:value-type="float">
            <text:p>0,167056108989198</text:p>
          </table:table-cell>
          <table:table-cell table:style-name="ce90" office:value-type="float" office:value="0.36505220140033" calcext:value-type="float">
            <text:p>0,36505220140033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0000149773200211179" calcext:value-type="float">
            <text:p>1,49773200211179E-12</text:p>
          </table:table-cell>
          <table:table-cell table:style-name="ce90" office:value-type="float" office:value="0.0000000000599092800844716" calcext:value-type="float">
            <text:p>5,99092800844716E-1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0135248298265196" calcext:value-type="float">
            <text:p>1,35248298265196E-09</text:p>
          </table:table-cell>
          <table:table-cell table:style-name="ce90" office:value-type="float" office:value="0.0000000405744894795587" calcext:value-type="float">
            <text:p>4,05744894795587E-0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" office:value-type="string" calcext:value-type="string">
            <text:p>BP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324086017035409" calcext:value-type="float">
            <text:p>0,324086017035409</text:p>
          </table:table-cell>
          <table:table-cell table:style-name="ce90" office:value-type="float" office:value="0.479248393886445" calcext:value-type="float">
            <text:p>0,479248393886445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4" office:value-type="string" calcext:value-type="string">
            <text:p>BP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275106199987906" calcext:value-type="float">
            <text:p>0,275106199987906</text:p>
          </table:table-cell>
          <table:table-cell table:style-name="ce91" office:value-type="float" office:value="0.466978171258641" calcext:value-type="float">
            <text:p>0,46697817125864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5" office:value-type="string" calcext:value-type="string">
            <text:p>MF_peptides</text:p>
          </table:table-cell>
          <table:table-cell table:style-name="ce11" office:value-type="string" calcext:value-type="string">
            <text:p>mean_comparison</text:p>
          </table:table-cell>
          <table:table-cell table:style-name="ce36" office:value-type="string" calcext:value-type="string">
            <text:p>known</text:p>
          </table:table-cell>
          <table:table-cell table:style-name="ce89" office:value-type="float" office:value="0.0000531578637106078" calcext:value-type="float">
            <text:p>5,31578637106078E-05</text:p>
          </table:table-cell>
          <table:table-cell table:style-name="ce89" office:value-type="float" office:value="0.000425262909684862" calcext:value-type="float">
            <text:p>0,000425262909684862</text:p>
          </table:table-cell>
          <table:table-cell table:style-name="ce69" office:value-type="float" office:value="7" calcext:value-type="float" table:number-columns-spanned="1" table:number-rows-spanned="16">
            <text:p>7</text:p>
          </table:table-cell>
          <table:table-cell table:style-name="ce69" office:value-type="float" office:value="5" calcext:value-type="float" table:number-columns-spanned="1" table:number-rows-spanned="16">
            <text:p>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248755293913074" calcext:value-type="float">
            <text:p>0,0248755293913074</text:p>
          </table:table-cell>
          <table:table-cell table:style-name="ce90" office:value-type="float" office:value="0.0877959860869672" calcext:value-type="float">
            <text:p>0,0877959860869672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686175782578081" calcext:value-type="float">
            <text:p>0,686175782578081</text:p>
          </table:table-cell>
          <table:table-cell table:style-name="ce90" office:value-type="float" office:value="0.784200894374949" calcext:value-type="float">
            <text:p>0,78420089437494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53983939113489" calcext:value-type="float">
            <text:p>0,553983939113489</text:p>
          </table:table-cell>
          <table:table-cell table:style-name="ce90" office:value-type="float" office:value="0.671495683773926" calcext:value-type="float">
            <text:p>0,67149568377392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027403660855266" calcext:value-type="float">
            <text:p>0,00027403660855266</text:p>
          </table:table-cell>
          <table:table-cell table:style-name="ce90" office:value-type="float" office:value="0.0018269107236844" calcext:value-type="float">
            <text:p>0,001826910723684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22685658564476" calcext:value-type="float">
            <text:p>0,122685658564476</text:p>
          </table:table-cell>
          <table:table-cell table:style-name="ce90" office:value-type="float" office:value="0.306556609114476" calcext:value-type="float">
            <text:p>0,30655660911447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785667360284261" calcext:value-type="float">
            <text:p>0,0785667360284261</text:p>
          </table:table-cell>
          <table:table-cell table:style-name="ce90" office:value-type="float" office:value="0.214272916441162" calcext:value-type="float">
            <text:p>0,214272916441162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156624556209996" calcext:value-type="float">
            <text:p>0,156624556209996</text:p>
          </table:table-cell>
          <table:table-cell table:style-name="ce90" office:value-type="float" office:value="0.361441283561528" calcext:value-type="float">
            <text:p>0,36144128356152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30119961892347" calcext:value-type="float">
            <text:p>0,30119961892347</text:p>
          </table:table-cell>
          <table:table-cell table:style-name="ce90" office:value-type="float" office:value="0.475578345668637" calcext:value-type="float">
            <text:p>0,47557834566863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64465464655747" calcext:value-type="float">
            <text:p>0,64465464655747</text:p>
          </table:table-cell>
          <table:table-cell table:style-name="ce90" office:value-type="float" office:value="0.751053957154334" calcext:value-type="float">
            <text:p>0,75105395715433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370587219952283" calcext:value-type="float">
            <text:p>0,0370587219952283</text:p>
          </table:table-cell>
          <table:table-cell table:style-name="ce90" office:value-type="float" office:value="0.123529073317428" calcext:value-type="float">
            <text:p>0,12352907331742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540799451356184" calcext:value-type="float">
            <text:p>0,540799451356184</text:p>
          </table:table-cell>
          <table:table-cell table:style-name="ce90" office:value-type="float" office:value="0.66547257108214" calcext:value-type="float">
            <text:p>0,66547257108214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000808268660606384" calcext:value-type="float">
            <text:p>8,08268660606384E-08</text:p>
          </table:table-cell>
          <table:table-cell table:style-name="ce90" office:value-type="float" office:value="0.00000107769154747518" calcext:value-type="float">
            <text:p>1,07769154747518E-0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0643927140066581" calcext:value-type="float">
            <text:p>6,43927140066581E-05</text:p>
          </table:table-cell>
          <table:table-cell table:style-name="ce90" office:value-type="float" office:value="0.000482945355049936" calcext:value-type="float">
            <text:p>0,000482945355049936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MF_peptides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404352281064466" calcext:value-type="float">
            <text:p>0,00404352281064466</text:p>
          </table:table-cell>
          <table:table-cell table:style-name="ce90" office:value-type="float" office:value="0.0186624129722061" calcext:value-type="float">
            <text:p>0,018662412972206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7" office:value-type="string" calcext:value-type="string">
            <text:p>MF_peptides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192181459204939" calcext:value-type="float">
            <text:p>0,192181459204939</text:p>
          </table:table-cell>
          <table:table-cell table:style-name="ce91" office:value-type="float" office:value="0.397616812148149" calcext:value-type="float">
            <text:p>0,39761681214814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33" office:value-type="string" calcext:value-type="string">
            <text:p>CC_peptides</text:p>
          </table:table-cell>
          <table:table-cell table:style-name="ce34" office:value-type="string" calcext:value-type="string">
            <text:p>mean_comparison</text:p>
          </table:table-cell>
          <table:table-cell table:style-name="ce39" office:value-type="string" calcext:value-type="string">
            <text:p>known</text:p>
          </table:table-cell>
          <table:table-cell table:style-name="ce45" office:value-type="float" office:value="0.322437343092722" calcext:value-type="float">
            <text:p>0,322437343092722</text:p>
          </table:table-cell>
          <table:table-cell table:style-name="ce45" office:value-type="float" office:value="0.479248393886445" calcext:value-type="float">
            <text:p>0,479248393886445</text:p>
          </table:table-cell>
          <table:table-cell table:style-name="ce69" office:value-type="float" office:value="4" calcext:value-type="float" table:number-columns-spanned="1" table:number-rows-spanned="8">
            <text:p>4</text:p>
          </table:table-cell>
          <table:table-cell table:style-name="ce69" office:value-type="float" office:value="3" calcext:value-type="float" table:number-columns-spanned="1" table:number-rows-spanned="8">
            <text:p>3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553493705451823" calcext:value-type="float">
            <text:p>0,0553493705451823</text:p>
          </table:table-cell>
          <table:table-cell table:style-name="ce90" office:value-type="float" office:value="0.166048111635547" calcext:value-type="float">
            <text:p>0,16604811163554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228404892194511" calcext:value-type="float">
            <text:p>0,228404892194511</text:p>
          </table:table-cell>
          <table:table-cell table:style-name="ce90" office:value-type="float" office:value="0.442073984892601" calcext:value-type="float">
            <text:p>0,44207398489260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823876905969364" calcext:value-type="float">
            <text:p>0,823876905969364</text:p>
          </table:table-cell>
          <table:table-cell table:style-name="ce90" office:value-type="float" office:value="0.878950486018588" calcext:value-type="float">
            <text:p>0,878950486018588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known</text:p>
          </table:table-cell>
          <table:table-cell table:style-name="ce90" office:value-type="float" office:value="0.00105753882643215" calcext:value-type="float">
            <text:p>0,00105753882643215</text:p>
          </table:table-cell>
          <table:table-cell table:style-name="ce90" office:value-type="float" office:value="0.00553512363991899" calcext:value-type="float">
            <text:p>0,00553512363991899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37" office:value-type="string" calcext:value-type="string">
            <text:p>unknown</text:p>
          </table:table-cell>
          <table:table-cell table:style-name="ce90" office:value-type="float" office:value="0.0257054860460325" calcext:value-type="float">
            <text:p>0,0257054860460325</text:p>
          </table:table-cell>
          <table:table-cell table:style-name="ce90" office:value-type="float" office:value="0.0881330950149687" calcext:value-type="float">
            <text:p>0,088133095014968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9" office:value-type="string" calcext:value-type="string">
            <text:p>CC_peptides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37" office:value-type="string" calcext:value-type="string">
            <text:p>differences</text:p>
          </table:table-cell>
          <table:table-cell table:style-name="ce90" office:value-type="float" office:value="0.000138529600943362" calcext:value-type="float">
            <text:p>0,000138529600943362</text:p>
          </table:table-cell>
          <table:table-cell table:style-name="ce90" office:value-type="float" office:value="0.000977856006659027" calcext:value-type="float">
            <text:p>0,000977856006659027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10" office:value-type="string" calcext:value-type="string">
            <text:p>CC_peptides</text:p>
          </table:table-cell>
          <table:table-cell table:style-name="ce13" office:value-type="string" calcext:value-type="string">
            <text:p>count_difference_comparison</text:p>
          </table:table-cell>
          <table:table-cell table:style-name="ce38" office:value-type="string" calcext:value-type="string">
            <text:p>differences</text:p>
          </table:table-cell>
          <table:table-cell table:style-name="ce91" office:value-type="float" office:value="0.000026569289494861" calcext:value-type="float">
            <text:p>2,6569289494861E-05</text:p>
          </table:table-cell>
          <table:table-cell table:style-name="ce91" office:value-type="float" office:value="0.00026569289494861" calcext:value-type="float">
            <text:p>0,00026569289494861</text:p>
          </table:table-cell>
          <table:covered-table-cell table:number-columns-repeated="2" table:style-name="ce1"/>
          <table:table-cell table:number-columns-repeated="5"/>
        </table:table-row>
        <table:table-row table:style-name="ro1" table:number-rows-repeated="104845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eparate_families_mean.D1:separate_families_mean.E121 separate_families_mean.K2:separate_families_mean.L41">
            <calcext:condition calcext:apply-style-name="Good" calcext:value="&lt;0.05" calcext:base-cell-address="separate_families_mean.D1"/>
          </calcext:conditional-format>
          <calcext:conditional-format calcext:target-range-address="separate_families_mean.C1:separate_families_mean.C1048576 separate_families_mean.J2:separate_families_mean.J41">
            <calcext:condition calcext:apply-style-name="Accent 2" calcext:value="contains-text(&quot;unknown&quot;)" calcext:base-cell-address="separate_families_mean.C1"/>
          </calcext:conditional-format>
          <calcext:conditional-format calcext:target-range-address="separate_families_mean.C1:separate_families_mean.C1048576 separate_families_mean.J2:separate_families_mean.J41">
            <calcext:condition calcext:apply-style-name="Accent 1" calcext:value="contains-text(&quot;known&quot;)" calcext:base-cell-address="separate_families_mean.C1"/>
          </calcext:conditional-format>
          <calcext:conditional-format calcext:target-range-address="separate_families_mean.C1:separate_families_mean.C1048576 separate_families_mean.J2:separate_families_mean.J41">
            <calcext:condition calcext:apply-style-name="Accent 3" calcext:value="contains-text(&quot;differences&quot;)" calcext:base-cell-address="separate_families_mean.C1"/>
          </calcext:conditional-format>
        </calcext:conditional-formats>
      </table:table>
      <table:table table:name="separate_families_top_ic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97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93" office:value-type="string" calcext:value-type="string">
            <text:p>data_type</text:p>
          </table:table-cell>
          <table:table-cell table:style-name="ce98" office:value-type="string" calcext:value-type="string">
            <text:p>pvalue</text:p>
          </table:table-cell>
          <table:table-cell table:style-name="ce98" office:value-type="string" calcext:value-type="string">
            <text:p>pvalue_bh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significant_bh</text:p>
          </table:table-cell>
        </table:table-row>
        <table:table-row table:style-name="ro1">
          <table:table-cell table:style-name="ce2" office:value-type="string" calcext:value-type="string">
            <text:p>BP_top_ic</text:p>
          </table:table-cell>
          <table:table-cell table:style-name="ce11" office:value-type="string" calcext:value-type="string">
            <text:p>mean_comparison</text:p>
          </table:table-cell>
          <table:table-cell table:style-name="ce94" office:value-type="string" calcext:value-type="string">
            <text:p>known</text:p>
          </table:table-cell>
          <table:table-cell table:style-name="ce99" office:value-type="float" office:value="0.470115305899504" calcext:value-type="float">
            <text:p>0,470115305899504</text:p>
          </table:table-cell>
          <table:table-cell table:style-name="ce99" office:value-type="float" office:value="0.873945499667451" calcext:value-type="float">
            <text:p>0,873945499667451</text:p>
          </table:table-cell>
          <table:table-cell table:style-name="ce69" office:value-type="float" office:value="2" calcext:value-type="float" table:number-columns-spanned="1" table:number-rows-spanned="16">
            <text:p>2</text:p>
          </table:table-cell>
          <table:table-cell table:style-name="ce69" office:value-type="float" office:value="2" calcext:value-type="float" table:number-columns-spanned="1" table:number-rows-spanned="16">
            <text:p>2</text:p>
          </table:table-cell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mean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737686255696705" calcext:value-type="float">
            <text:p>0,737686255696705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57024146659024" calcext:value-type="float">
            <text:p>0,57024146659024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36509511180038" calcext:value-type="float">
            <text:p>0,36509511180038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315154113190767" calcext:value-type="float">
            <text:p>0,315154113190767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667484973698475" calcext:value-type="float">
            <text:p>0,667484973698475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322787513170375" calcext:value-type="float">
            <text:p>0,322787513170375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877646154265017" calcext:value-type="float">
            <text:p>0,877646154265017</text:p>
          </table:table-cell>
          <table:table-cell table:style-name="ce100" office:value-type="float" office:value="0.902721758672589" calcext:value-type="float">
            <text:p>0,902721758672589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574090061304524" calcext:value-type="float">
            <text:p>0,574090061304524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538383842479347" calcext:value-type="float">
            <text:p>0,538383842479347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380995672021992" calcext:value-type="float">
            <text:p>0,380995672021992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673935189355023" calcext:value-type="float">
            <text:p>0,673935189355023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95" office:value-type="string" calcext:value-type="string">
            <text:p>differences</text:p>
          </table:table-cell>
          <table:table-cell table:style-name="ce100" office:value-type="float" office:value="0.5007108297766" calcext:value-type="float">
            <text:p>0,5007108297766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95" office:value-type="string" calcext:value-type="string">
            <text:p>differences</text:p>
          </table:table-cell>
          <table:table-cell table:style-name="ce100" office:value-type="float" office:value="0.00146066544716136" calcext:value-type="float">
            <text:p>0,00146066544716136</text:p>
          </table:table-cell>
          <table:table-cell table:style-name="ce100" office:value-type="float" office:value="0.0272686593928272" calcext:value-type="float">
            <text:p>0,0272686593928272</text:p>
          </table:table-cell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BP_top_ic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95" office:value-type="string" calcext:value-type="string">
            <text:p>differences</text:p>
          </table:table-cell>
          <table:table-cell table:style-name="ce100" office:value-type="float" office:value="0.502767597824419" calcext:value-type="float">
            <text:p>0,502767597824419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4" office:value-type="string" calcext:value-type="string">
            <text:p>BP_top_ic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96" office:value-type="string" calcext:value-type="string">
            <text:p>differences</text:p>
          </table:table-cell>
          <table:table-cell table:style-name="ce101" office:value-type="float" office:value="0.00151492552182373" calcext:value-type="float">
            <text:p>0,00151492552182373</text:p>
          </table:table-cell>
          <table:table-cell table:style-name="ce101" office:value-type="float" office:value="0.0272686593928272" calcext:value-type="float">
            <text:p>0,0272686593928272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>
            <text:p>MF_top_ic</text:p>
          </table:table-cell>
          <table:table-cell table:style-name="ce11" office:value-type="string" calcext:value-type="string">
            <text:p>mean_comparison</text:p>
          </table:table-cell>
          <table:table-cell table:style-name="ce94" office:value-type="string" calcext:value-type="string">
            <text:p>known</text:p>
          </table:table-cell>
          <table:table-cell table:style-name="ce99" office:value-type="float" office:value="0.685691925106963" calcext:value-type="float">
            <text:p>0,685691925106963</text:p>
          </table:table-cell>
          <table:table-cell table:style-name="ce99" office:value-type="float" office:value="0.873945499667451" calcext:value-type="float">
            <text:p>0,873945499667451</text:p>
          </table:table-cell>
          <table:table-cell table:style-name="ce69" office:value-type="float" office:value="0" calcext:value-type="float" table:number-columns-spanned="1" table:number-rows-spanned="16">
            <text:p>0</text:p>
          </table:table-cell>
          <table:table-cell table:style-name="ce69" office:value-type="float" office:value="0" calcext:value-type="float" table:number-columns-spanned="1" table:number-rows-spanned="16">
            <text:p>0</text:p>
          </table:table-cell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mean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860203559298441" calcext:value-type="float">
            <text:p>0,860203559298441</text:p>
          </table:table-cell>
          <table:table-cell table:style-name="ce100" office:value-type="float" office:value="0.902721758672589" calcext:value-type="float">
            <text:p>0,902721758672589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724753368750519" calcext:value-type="float">
            <text:p>0,724753368750519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769339768628684" calcext:value-type="float">
            <text:p>0,769339768628684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150363206128967" calcext:value-type="float">
            <text:p>0,150363206128967</text:p>
          </table:table-cell>
          <table:table-cell table:style-name="ce100" office:value-type="float" office:value="0.848053716864662" calcext:value-type="float">
            <text:p>0,84805371686466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normalized_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235570476906851" calcext:value-type="float">
            <text:p>0,235570476906851</text:p>
          </table:table-cell>
          <table:table-cell table:style-name="ce100" office:value-type="float" office:value="0.848053716864662" calcext:value-type="float">
            <text:p>0,84805371686466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95" office:value-type="string" calcext:value-type="string">
            <text:p>known</text:p>
          </table:table-cell>
          <table:table-cell table:number-columns-repeated="2" table:style-name="ce100" office:value-type="float" office:value="0.95672057227203" calcext:value-type="float">
            <text:p>0,95672057227203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mean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676161769815852" calcext:value-type="float">
            <text:p>0,676161769815852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687436680790874" calcext:value-type="float">
            <text:p>0,687436680790874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81671430153066" calcext:value-type="float">
            <text:p>0,81671430153066</text:p>
          </table:table-cell>
          <table:table-cell table:style-name="ce100" office:value-type="float" office:value="0.890961056215266" calcext:value-type="float">
            <text:p>0,890961056215266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95" office:value-type="string" calcext:value-type="string">
            <text:p>known</text:p>
          </table:table-cell>
          <table:table-cell table:style-name="ce100" office:value-type="float" office:value="0.10772684222051" calcext:value-type="float">
            <text:p>0,10772684222051</text:p>
          </table:table-cell>
          <table:table-cell table:style-name="ce100" office:value-type="float" office:value="0.848053716864662" calcext:value-type="float">
            <text:p>0,84805371686466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normalized_count_comparison</text:p>
          </table:table-cell>
          <table:table-cell table:style-name="ce95" office:value-type="string" calcext:value-type="string">
            <text:p>unknown</text:p>
          </table:table-cell>
          <table:table-cell table:style-name="ce100" office:value-type="float" office:value="0.215297965965463" calcext:value-type="float">
            <text:p>0,215297965965463</text:p>
          </table:table-cell>
          <table:table-cell table:style-name="ce100" office:value-type="float" office:value="0.848053716864662" calcext:value-type="float">
            <text:p>0,84805371686466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mean_difference_comparison</text:p>
          </table:table-cell>
          <table:table-cell table:style-name="ce95" office:value-type="string" calcext:value-type="string">
            <text:p>differences</text:p>
          </table:table-cell>
          <table:table-cell table:style-name="ce100" office:value-type="float" office:value="0.541863616506056" calcext:value-type="float">
            <text:p>0,541863616506056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count_difference_comparison</text:p>
          </table:table-cell>
          <table:table-cell table:style-name="ce95" office:value-type="string" calcext:value-type="string">
            <text:p>differences</text:p>
          </table:table-cell>
          <table:table-cell table:style-name="ce100" office:value-type="float" office:value="0.225379513125277" calcext:value-type="float">
            <text:p>0,225379513125277</text:p>
          </table:table-cell>
          <table:table-cell table:style-name="ce100" office:value-type="float" office:value="0.848053716864662" calcext:value-type="float">
            <text:p>0,848053716864662</text:p>
          </table:table-cell>
          <table:covered-table-cell table:number-columns-repeated="2" table:style-name="ce1"/>
        </table:table-row>
        <table:table-row table:style-name="ro1">
          <table:table-cell table:style-name="ce6" office:value-type="string" calcext:value-type="string">
            <text:p>MF_top_ic</text:p>
          </table:table-cell>
          <table:table-cell table:style-name="ce12" office:value-type="string" calcext:value-type="string">
            <text:p>filtered_mean_difference_comparison</text:p>
          </table:table-cell>
          <table:table-cell table:style-name="ce95" office:value-type="string" calcext:value-type="string">
            <text:p>differences</text:p>
          </table:table-cell>
          <table:table-cell table:style-name="ce100" office:value-type="float" office:value="0.541863616506056" calcext:value-type="float">
            <text:p>0,541863616506056</text:p>
          </table:table-cell>
          <table:table-cell table:style-name="ce100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7" office:value-type="string" calcext:value-type="string">
            <text:p>MF_top_ic</text:p>
          </table:table-cell>
          <table:table-cell table:style-name="ce13" office:value-type="string" calcext:value-type="string">
            <text:p>filtered_count_difference_comparison</text:p>
          </table:table-cell>
          <table:table-cell table:style-name="ce96" office:value-type="string" calcext:value-type="string">
            <text:p>differences</text:p>
          </table:table-cell>
          <table:table-cell table:style-name="ce101" office:value-type="float" office:value="0.225379513125277" calcext:value-type="float">
            <text:p>0,225379513125277</text:p>
          </table:table-cell>
          <table:table-cell table:style-name="ce101" office:value-type="float" office:value="0.848053716864662" calcext:value-type="float">
            <text:p>0,848053716864662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BP_median_ic</text:p>
          </table:table-cell>
          <table:table-cell table:style-name="ce11" office:value-type="string" calcext:value-type="string">
            <text:p>median_comparison</text:p>
          </table:table-cell>
          <table:table-cell table:style-name="ce94" office:value-type="string" calcext:value-type="string">
            <text:p>known</text:p>
          </table:table-cell>
          <table:table-cell table:style-name="ce99" office:value-type="float" office:value="0.225515197017888" calcext:value-type="float">
            <text:p>0,225515197017888</text:p>
          </table:table-cell>
          <table:table-cell table:style-name="ce99" office:value-type="float" office:value="0.848053716864662" calcext:value-type="float">
            <text:p>0,848053716864662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4" office:value-type="string" calcext:value-type="string">
            <text:p>BP_median_ic</text:p>
          </table:table-cell>
          <table:table-cell table:style-name="ce13" office:value-type="string" calcext:value-type="string">
            <text:p>median_comparison</text:p>
          </table:table-cell>
          <table:table-cell table:style-name="ce96" office:value-type="string" calcext:value-type="string">
            <text:p>unknown</text:p>
          </table:table-cell>
          <table:table-cell table:style-name="ce101" office:value-type="float" office:value="0.776840444148846" calcext:value-type="float">
            <text:p>0,776840444148846</text:p>
          </table:table-cell>
          <table:table-cell table:style-name="ce101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>
            <text:p>MF_median_ic</text:p>
          </table:table-cell>
          <table:table-cell table:style-name="ce11" office:value-type="string" calcext:value-type="string">
            <text:p>median_comparison</text:p>
          </table:table-cell>
          <table:table-cell table:style-name="ce94" office:value-type="string" calcext:value-type="string">
            <text:p>known</text:p>
          </table:table-cell>
          <table:table-cell table:style-name="ce99" office:value-type="float" office:value="0.034139899118539" calcext:value-type="float">
            <text:p>0,034139899118539</text:p>
          </table:table-cell>
          <table:table-cell table:style-name="ce99" office:value-type="float" office:value="0.409678789422467" calcext:value-type="float">
            <text:p>0,409678789422467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7" office:value-type="string" calcext:value-type="string">
            <text:p>MF_median_ic</text:p>
          </table:table-cell>
          <table:table-cell table:style-name="ce13" office:value-type="string" calcext:value-type="string">
            <text:p>median_comparison</text:p>
          </table:table-cell>
          <table:table-cell table:style-name="ce96" office:value-type="string" calcext:value-type="string">
            <text:p>unknown</text:p>
          </table:table-cell>
          <table:table-cell table:style-name="ce55" office:value-type="float" office:value="0.448987464090898" calcext:value-type="float">
            <text:p>0,448987464090898</text:p>
          </table:table-cell>
          <table:table-cell table:style-name="ce55" office:value-type="float" office:value="0.873945499667451" calcext:value-type="float">
            <text:p>0,873945499667451</text:p>
          </table:table-cell>
          <table:covered-table-cell table:number-columns-repeated="2" table:style-name="ce1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eparate_families_top_ic.D1:separate_families_top_ic.E36">
            <calcext:condition calcext:apply-style-name="Good" calcext:value="&lt;0.05" calcext:base-cell-address="separate_families_top_ic.D1"/>
          </calcext:conditional-format>
          <calcext:conditional-format calcext:target-range-address="separate_families_top_ic.D37:separate_families_top_ic.E37">
            <calcext:condition calcext:apply-style-name="Good" calcext:value="&lt;0.05" calcext:base-cell-address="separate_families_top_ic.D37"/>
          </calcext:conditional-format>
          <calcext:conditional-format calcext:target-range-address="separate_families_top_ic.C1:separate_families_top_ic.C1048576">
            <calcext:condition calcext:apply-style-name="Accent 2" calcext:value="contains-text(&quot;unknown&quot;)" calcext:base-cell-address="separate_families_top_ic.C1"/>
          </calcext:conditional-format>
          <calcext:conditional-format calcext:target-range-address="separate_families_top_ic.C1:separate_families_top_ic.C1048576">
            <calcext:condition calcext:apply-style-name="Accent 1" calcext:value="contains-text(&quot;known&quot;)" calcext:base-cell-address="separate_families_top_ic.C1"/>
          </calcext:conditional-format>
          <calcext:conditional-format calcext:target-range-address="separate_families_top_ic.C1:separate_families_top_ic.C1048576">
            <calcext:condition calcext:apply-style-name="Accent 3" calcext:value="contains-text(&quot;differences&quot;)" calcext:base-cell-address="separate_families_top_ic.C1"/>
          </calcext:conditional-format>
        </calcext:conditional-formats>
      </table:table>
      <table:table table:name="summary_v1" table:style-name="ta1">
        <table:table-column table:style-name="co7" table:default-cell-style-name="ce105"/>
        <table:table-column table:style-name="co8" table:default-cell-style-name="Default"/>
        <table:table-column table:style-name="co3" table:default-cell-style-name="ce12"/>
        <table:table-column table:style-name="co3" table:number-columns-repeated="2" table:default-cell-style-name="ce62"/>
        <table:table-column table:style-name="co9" table:default-cell-style-name="ce117"/>
        <table:table-column table:style-name="co10" table:default-cell-style-name="ce121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data_type</text:p>
          </table:table-cell>
          <table:table-cell table:style-name="ce61" office:value-type="string" calcext:value-type="string">
            <text:p>pvalue</text:p>
          </table:table-cell>
          <table:table-cell table:style-name="ce61" office:value-type="string" calcext:value-type="string">
            <text:p>pvalue_bh</text:p>
          </table:table-cell>
          <table:table-cell table:style-name="ce115" office:value-type="string" calcext:value-type="string">
            <text:p>known</text:p>
          </table:table-cell>
          <table:table-cell table:style-name="ce119" office:value-type="string" calcext:value-type="string">
            <text:p>unknown</text:p>
          </table:table-cell>
        </table:table-row>
        <table:table-row table:style-name="ro1">
          <table:table-cell table:style-name="ce12" office:value-type="string" calcext:value-type="string">
            <text:p>lengths</text:p>
          </table:table-cell>
          <table:table-cell table:style-name="ce12" office:value-type="string" calcext:value-type="string">
            <text:p>percent_overlap_chainsaw</text:p>
          </table:table-cell>
          <table:table-cell office:value-type="string" calcext:value-type="string">
            <text:p>differen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 office:value-type="string" calcext:value-type="string">
            <text:p>mniejsze</text:p>
          </table:table-cell>
          <table:table-cell table:style-name="ce120" office:value-type="string" calcext:value-type="string">
            <text:p>większe</text:p>
          </table:table-cell>
        </table:table-row>
        <table:table-row table:style-name="ro1">
          <table:table-cell table:style-name="ce12" office:value-type="string" calcext:value-type="string">
            <text:p>lengths</text:p>
          </table:table-cell>
          <table:table-cell table:style-name="ce12" office:value-type="string" calcext:value-type="string">
            <text:p>length</text:p>
          </table:table-cell>
          <table:table-cell office:value-type="string" calcext:value-type="string">
            <text:p>known</text:p>
          </table:table-cell>
          <table:table-cell table:style-name="ce63" office:value-type="float" office:value="1.20743000975256E-281" calcext:value-type="float">
            <text:p>1,21E-281</text:p>
          </table:table-cell>
          <table:table-cell table:style-name="ce63" office:value-type="float" office:value="1.02631550828968E-280" calcext:value-type="float">
            <text:p>1,03E-280</text:p>
          </table:table-cell>
          <table:table-cell office:value-type="string" calcext:value-type="string">
            <text:p>chainsaw większ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2" office:value-type="string" calcext:value-type="string">
            <text:p>lengths</text:p>
          </table:table-cell>
          <table:table-cell table:style-name="ce13" office:value-type="string" calcext:value-type="string">
            <text:p>length</text:p>
          </table:table-cell>
          <table:table-cell office:value-type="string" calcext:value-type="string">
            <text:p>unknown</text:p>
          </table:table-cell>
          <table:table-cell office:value-type="float" office:value="0.0203834246364386" calcext:value-type="float">
            <text:p>0,0203834246364386</text:p>
          </table:table-cell>
          <table:table-cell office:value-type="float" office:value="0.0315016562563141" calcext:value-type="float">
            <text:p>0,0315016562563141</text:p>
          </table:table-cell>
          <table:table-cell table:style-name="ce118" office:value-type="string" calcext:value-type="string">
            <text:p>-</text:p>
          </table:table-cell>
          <table:table-cell table:style-name="ce122" office:value-type="string" calcext:value-type="string">
            <text:p>chainsaw większe</text:p>
          </table:table-cell>
        </table:table-row>
        <table:table-row table:style-name="ro1">
          <table:table-cell table:style-name="ce104" office:value-type="string" calcext:value-type="string">
            <text:p>MF_02</text:p>
          </table:table-cell>
          <table:table-cell office:value-type="string" calcext:value-type="string">
            <text:p>count_difference_comparison</text:p>
          </table:table-cell>
          <table:table-cell table:style-name="ce11" office:value-type="string" calcext:value-type="string">
            <text:p>differences</text:p>
          </table:table-cell>
          <table:table-cell table:style-name="ce64" office:value-type="float" office:value="0.705210804646543" calcext:value-type="float">
            <text:p>0,705210804646543</text:p>
          </table:table-cell>
          <table:table-cell table:style-name="ce64" office:value-type="float" office:value="0.749286479936952" calcext:value-type="float">
            <text:p>0,749286479936952</text:p>
          </table:table-cell>
          <table:table-cell table:style-name="ce116" office:value-type="string" calcext:value-type="string">
            <text:p>pfam większe</text:p>
          </table:table-cell>
          <table:table-cell table:style-name="ce120" office:value-type="string" calcext:value-type="string">
            <text:p>pfam większe</text:p>
          </table:table-cell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count_difference_comparison</text:p>
          </table:table-cell>
          <table:table-cell office:value-type="string" calcext:value-type="string">
            <text:p>differences</text:p>
          </table:table-cell>
          <table:table-cell office:value-type="float" office:value="0.00325805625572433" calcext:value-type="float">
            <text:p>0,00325805625572433</text:p>
          </table:table-cell>
          <table:table-cell office:value-type="float" office:value="0.00615410626081263" calcext:value-type="float">
            <text:p>0,00615410626081263</text:p>
          </table:table-cell>
          <table:table-cell table:number-columns-repeated="2" office:value-type="string" calcext:value-type="string">
            <text:p>pfam większe</text:p>
          </table:table-cell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count_difference_comparison</text:p>
          </table:table-cell>
          <table:table-cell office:value-type="string" calcext:value-type="string">
            <text:p>differences</text:p>
          </table:table-cell>
          <table:table-cell table:style-name="ce63" office:value-type="float" office:value="0.000000804330674788188" calcext:value-type="float">
            <text:p>8,04E-07</text:p>
          </table:table-cell>
          <table:table-cell table:style-name="ce63" office:value-type="float" office:value="0.00000227893691189987" calcext:value-type="float">
            <text:p>2,28E-06</text:p>
          </table:table-cell>
          <table:table-cell office:value-type="string" calcext:value-type="string">
            <text:p>równe</text:p>
          </table:table-cell>
          <table:table-cell office:value-type="string" calcext:value-type="string">
            <text:p>pfam większe</text:p>
          </table:table-cell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count_difference_comparison</text:p>
          </table:table-cell>
          <table:table-cell office:value-type="string" calcext:value-type="string">
            <text:p>differences</text:p>
          </table:table-cell>
          <table:table-cell office:value-type="float" office:value="0.00127168473431914" calcext:value-type="float">
            <text:p>0,00127168473431914</text:p>
          </table:table-cell>
          <table:table-cell office:value-type="float" office:value="0.00270233006042818" calcext:value-type="float">
            <text:p>0,00270233006042818</text:p>
          </table:table-cell>
          <table:table-cell table:number-columns-repeated="2" office:value-type="string" calcext:value-type="string">
            <text:p>równe</text:p>
          </table:table-cell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count_difference_comparison</text:p>
          </table:table-cell>
          <table:table-cell office:value-type="string" calcext:value-type="string">
            <text:p>differences</text:p>
          </table:table-cell>
          <table:table-cell table:number-columns-repeated="2" office:value-type="float" office:value="0.966859242901965" calcext:value-type="float">
            <text:p>0,966859242901965</text:p>
          </table:table-cell>
          <table:table-cell table:number-columns-repeated="2" office:value-type="string" calcext:value-type="string">
            <text:p>chainsaw większe</text:p>
          </table:table-cell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count_difference_comparison</text:p>
          </table:table-cell>
          <table:table-cell office:value-type="string" calcext:value-type="string">
            <text:p>differences</text:p>
          </table:table-cell>
          <table:table-cell office:value-type="float" office:value="0.00398265750629779" calcext:value-type="float">
            <text:p>0,00398265750629779</text:p>
          </table:table-cell>
          <table:table-cell office:value-type="float" office:value="0.00677051776070624" calcext:value-type="float">
            <text:p>0,00677051776070624</text:p>
          </table:table-cell>
          <table:table-cell office:value-type="string" calcext:value-type="string">
            <text:p>równe</text:p>
          </table:table-cell>
          <table:table-cell office:value-type="string" calcext:value-type="string">
            <text:p>chainsaw większe</text:p>
          </table:table-cell>
        </table:table-row>
        <table:table-row table:style-name="ro1">
          <table:table-cell office:value-type="string" calcext:value-type="string">
            <text:p>MF_02</text:p>
          </table:table-cell>
          <table:table-cell office:value-type="string" calcext:value-type="string">
            <text:p>mean_difference_comparison</text:p>
          </table:table-cell>
          <table:table-cell office:value-type="string" calcext:value-type="string">
            <text:p>differences</text:p>
          </table:table-cell>
          <table:table-cell table:style-name="ce63" office:value-type="float" office:value="0.0000000132675733582908" calcext:value-type="float">
            <text:p>1,33E-08</text:p>
          </table:table-cell>
          <table:table-cell table:style-name="ce63" office:value-type="float" office:value="0.0000000451097494181886" calcext:value-type="float">
            <text:p>4,51E-08</text:p>
          </table:table-cell>
          <table:table-cell table:number-columns-repeated="2" office:value-type="string" calcext:value-type="string">
            <text:p>równe</text:p>
          </table:table-cell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mean_difference_comparison</text:p>
          </table:table-cell>
          <table:table-cell office:value-type="string" calcext:value-type="string">
            <text:p>differences</text:p>
          </table:table-cell>
          <table:table-cell table:style-name="ce63" office:value-type="float" office:value="1.55606057766099E-035" calcext:value-type="float">
            <text:p>1,56E-35</text:p>
          </table:table-cell>
          <table:table-cell table:style-name="ce63" office:value-type="float" office:value="8.81767660674561E-035" calcext:value-type="float">
            <text:p>8,82E-35</text:p>
          </table:table-cell>
          <table:table-cell table:number-columns-repeated="2" office:value-type="string" calcext:value-type="string">
            <text:p>równe</text:p>
          </table:table-cell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mean_difference_comparison</text:p>
          </table:table-cell>
          <table:table-cell office:value-type="string" calcext:value-type="string">
            <text:p>differences</text:p>
          </table:table-cell>
          <table:table-cell table:style-name="ce63" office:value-type="float" office:value="0.0000000000000631765226134791" calcext:value-type="float">
            <text:p>6,32E-14</text:p>
          </table:table-cell>
          <table:table-cell table:style-name="ce63" office:value-type="float" office:value="0.000000000000268500221107286" calcext:value-type="float">
            <text:p>2,69E-13</text:p>
          </table:table-cell>
          <table:table-cell office:value-type="string" calcext:value-type="string">
            <text:p>pfam większe</text:p>
          </table:table-cell>
          <table:table-cell office:value-type="string" calcext:value-type="string">
            <text:p>chainsaw większe (prawie równe)</text:p>
          </table:table-cell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mean_difference_comparison</text:p>
          </table:table-cell>
          <table:table-cell office:value-type="string" calcext:value-type="string">
            <text:p>differences</text:p>
          </table:table-cell>
          <table:table-cell table:style-name="ce63" office:value-type="float" office:value="0.0000576871619363354" calcext:value-type="float">
            <text:p>5,77E-05</text:p>
          </table:table-cell>
          <table:table-cell office:value-type="float" office:value="0.000140097393273957" calcext:value-type="float">
            <text:p>0,000140097393273957</text:p>
          </table:table-cell>
          <table:table-cell table:number-columns-repeated="2" office:value-type="string" calcext:value-type="string">
            <text:p>równe</text:p>
          </table:table-cell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mean_difference_comparison</text:p>
          </table:table-cell>
          <table:table-cell office:value-type="string" calcext:value-type="string">
            <text:p>differences</text:p>
          </table:table-cell>
          <table:table-cell office:value-type="float" office:value="0.176859209826583" calcext:value-type="float">
            <text:p>0,176859209826583</text:p>
          </table:table-cell>
          <table:table-cell office:value-type="float" office:value="0.231277428234762" calcext:value-type="float">
            <text:p>0,231277428234762</text:p>
          </table:table-cell>
          <table:table-cell table:number-columns-repeated="2" office:value-type="string" calcext:value-type="string">
            <text:p>równe</text:p>
          </table:table-cell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mean_difference_comparison</text:p>
          </table:table-cell>
          <table:table-cell office:value-type="string" calcext:value-type="string">
            <text:p>differences</text:p>
          </table:table-cell>
          <table:table-cell office:value-type="float" office:value="0.225641025641026" calcext:value-type="float">
            <text:p>0,225641025641026</text:p>
          </table:table-cell>
          <table:table-cell office:value-type="float" office:value="0.273992673992674" calcext:value-type="float">
            <text:p>0,273992673992674</text:p>
          </table:table-cell>
          <table:table-cell table:style-name="ce118" office:value-type="string" calcext:value-type="string">
            <text:p>pfam większe</text:p>
          </table:table-cell>
          <table:table-cell table:style-name="ce122" office:value-type="string" calcext:value-type="string">
            <text:p>pfam większe</text:p>
          </table:table-cell>
        </table:table-row>
        <table:table-row table:style-name="ro1">
          <table:table-cell table:style-name="ce104" office:value-type="string" calcext:value-type="string">
            <text:p>MF_median_ic</text:p>
          </table:table-cell>
          <table:table-cell table:style-name="ce11" office:value-type="string" calcext:value-type="string">
            <text:p>median_ic_comparison</text:p>
          </table:table-cell>
          <table:table-cell table:style-name="ce11" office:value-type="string" calcext:value-type="string">
            <text:p>known</text:p>
          </table:table-cell>
          <table:table-cell table:style-name="ce64" office:value-type="float" office:value="0.034139899118539" calcext:value-type="float">
            <text:p>0,034139899118539</text:p>
          </table:table-cell>
          <table:table-cell table:style-name="ce64" office:value-type="float" office:value="0.0483648570845968" calcext:value-type="float">
            <text:p>0,0483648570845968</text:p>
          </table:table-cell>
          <table:table-cell table:style-name="ce116" office:value-type="string" calcext:value-type="string">
            <text:p>chainsaw większe</text:p>
          </table:table-cell>
          <table:table-cell table:style-name="ce120" office:value-type="string" calcext:value-type="string">
            <text:p>-</text:p>
          </table:table-cell>
        </table:table-row>
        <table:table-row table:style-name="ro1">
          <table:table-cell table:style-name="ce107" office:value-type="string" calcext:value-type="string">
            <text:p>MF_median_ic</text:p>
          </table:table-cell>
          <table:table-cell table:style-name="ce13" office:value-type="string" calcext:value-type="string">
            <text:p>median_ic_comparison</text:p>
          </table:table-cell>
          <table:table-cell table:style-name="ce13" office:value-type="string" calcext:value-type="string">
            <text:p>unknown</text:p>
          </table:table-cell>
          <table:table-cell table:style-name="ce65" office:value-type="float" office:value="0.448987464090898" calcext:value-type="float">
            <text:p>0,448987464090898</text:p>
          </table:table-cell>
          <table:table-cell table:style-name="ce65" office:value-type="float" office:value="0.508852459303018" calcext:value-type="float">
            <text:p>0,508852459303018</text:p>
          </table:table-cell>
          <table:table-cell table:style-name="ce118" office:value-type="string" calcext:value-type="string">
            <text:p>-</text:p>
          </table:table-cell>
          <table:table-cell table:style-name="ce122" office:value-type="string" calcext:value-type="string">
            <text:p>chainsaw większe</text:p>
          </table:table-cell>
        </table:table-row>
        <table:table-row table:style-name="ro1">
          <table:table-cell table:style-name="ce58"/>
          <table:table-cell table:style-name="ce60" table:number-columns-repeated="2"/>
          <table:table-cell table:style-name="Default" table:number-columns-repeated="4"/>
        </table:table-row>
        <table:table-row table:style-name="ro1">
          <table:table-cell table:style-name="ce59" table:number-columns-repeated="3"/>
          <table:table-cell table:style-name="Default" table:number-columns-repeated="4"/>
        </table:table-row>
        <calcext:conditional-formats>
          <calcext:conditional-format calcext:target-range-address="summary_v1.D2:summary_v1.E18">
            <calcext:condition calcext:apply-style-name="Good" calcext:value="&lt;0.05" calcext:base-cell-address="summary_v1.D2"/>
          </calcext:conditional-format>
          <calcext:conditional-format calcext:target-range-address="summary_v1.D2:summary_v1.E18">
            <calcext:condition calcext:apply-style-name="Good" calcext:value="&lt;0.05" calcext:base-cell-address="summary_v1.D2"/>
          </calcext:conditional-format>
          <calcext:conditional-format calcext:target-range-address="summary_v1.D2:summary_v1.E18">
            <calcext:condition calcext:apply-style-name="Good" calcext:value="&lt;0.05" calcext:base-cell-address="summary_v1.D2"/>
          </calcext:conditional-format>
          <calcext:conditional-format calcext:target-range-address="summary_v1.D2:summary_v1.E18">
            <calcext:condition calcext:apply-style-name="Good" calcext:value="&lt;0.05" calcext:base-cell-address="summary_v1.D2"/>
          </calcext:conditional-format>
          <calcext:conditional-format calcext:target-range-address="summary_v1.D2:summary_v1.E18">
            <calcext:condition calcext:apply-style-name="Good" calcext:value="&lt;0.05" calcext:base-cell-address="summary_v1.D2"/>
          </calcext:conditional-format>
          <calcext:conditional-format calcext:target-range-address="summary_v1.D2:summary_v1.E18">
            <calcext:condition calcext:apply-style-name="Good" calcext:value="&lt;0.05" calcext:base-cell-address="summary_v1.D2"/>
          </calcext:conditional-format>
          <calcext:conditional-format calcext:target-range-address="summary_v1.D1:summary_v1.E18">
            <calcext:condition calcext:apply-style-name="Good" calcext:value="&lt;0.05" calcext:base-cell-address="summary_v1.D1"/>
          </calcext:conditional-format>
          <calcext:conditional-format calcext:target-range-address="summary_v1.D1:summary_v1.E18">
            <calcext:condition calcext:apply-style-name="Good" calcext:value="&lt;0.05" calcext:base-cell-address="summary_v1.D1"/>
          </calcext:conditional-format>
        </calcext:conditional-formats>
      </table:table>
      <table:table table:name="summary_v2" table:style-name="ta1">
        <table:table-column table:style-name="co11" table:default-cell-style-name="ce12"/>
        <table:table-column table:style-name="co12" table:default-cell-style-name="ce12"/>
        <table:table-column table:style-name="co3" table:default-cell-style-name="ce12"/>
        <table:table-column table:style-name="co3" table:number-columns-repeated="2" table:default-cell-style-name="ce140"/>
        <table:table-column table:style-name="co13" table:default-cell-style-name="ce147"/>
        <table:table-column table:style-name="co14" table:default-cell-style-name="ce14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pvalue_bh</text:p>
          </table:table-cell>
          <table:table-cell table:style-name="ce1" office:value-type="string" calcext:value-type="string">
            <text:p>pfam</text:p>
          </table:table-cell>
          <table:table-cell table:style-name="ce1" office:value-type="string" calcext:value-type="string">
            <text:p>chainsa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percent_overlap_chainsaw</text:p>
          </table:table-cell>
          <table:table-cell table:style-name="ce1" office:value-type="string" calcext:value-type="string">
            <text:p>difference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71" office:value-type="string" calcext:value-type="string" table:number-columns-spanned="2" table:number-rows-spanned="1">
            <text:p>unknown ma większy</text:p>
          </table:table-cell>
          <table:covered-table-cell table:style-name="ce1"/>
          <table:table-cell table:style-name="ce141" table:number-columns-repeated="2"/>
        </table:table-row>
        <table:table-row table:style-name="ro1">
          <table:table-cell table:style-name="ce11" office:value-type="string" calcext:value-type="string">
            <text:p>lengths</text:p>
          </table:table-cell>
          <table:table-cell table:style-name="ce11" office:value-type="string" calcext:value-type="string">
            <text:p>length</text:p>
          </table:table-cell>
          <table:table-cell table:style-name="ce11" office:value-type="string" calcext:value-type="string">
            <text:p>known</text:p>
          </table:table-cell>
          <table:table-cell table:style-name="ce134" office:value-type="float" office:value="1.20743000975256E-281" calcext:value-type="float">
            <text:p>1,20743000975256E-281</text:p>
          </table:table-cell>
          <table:table-cell table:style-name="ce134" office:value-type="float" office:value="1.75077351414122E-280" calcext:value-type="float">
            <text:p>1,75077351414122E-280</text:p>
          </table:table-cell>
          <table:table-cell table:style-name="ce136"/>
          <table:table-cell table:style-name="ce136" office:value-type="string" calcext:value-type="string">
            <text:p>większe</text:p>
          </table:table-cell>
          <table:table-cell table:style-name="ce141" office:value-type="string" calcext:value-type="string">
            <text:p>jak jest samo większe to znaczy że mediana jest większa ale często drugi rozkład jest wyższy bo jest bardziej nie równy</text:p>
          </table:table-cell>
          <table:table-cell table:style-name="ce141"/>
        </table:table-row>
        <table:table-row table:style-name="ro1">
          <table:table-cell table:style-name="ce13" office:value-type="string" calcext:value-type="string">
            <text:p>lengths</text:p>
          </table:table-cell>
          <table:table-cell table:style-name="ce13" office:value-type="string" calcext:value-type="string">
            <text:p>length</text:p>
          </table:table-cell>
          <table:table-cell table:style-name="ce13" office:value-type="string" calcext:value-type="string">
            <text:p>unknown</text:p>
          </table:table-cell>
          <table:table-cell table:style-name="ce135" office:value-type="float" office:value="0.0203834246364386" calcext:value-type="float">
            <text:p>0,0203834246364386</text:p>
          </table:table-cell>
          <table:table-cell table:style-name="ce135" office:value-type="float" office:value="0.0537381194960653" calcext:value-type="float">
            <text:p>0,0537381194960653</text:p>
          </table:table-cell>
          <table:table-cell table:style-name="ce137"/>
          <table:table-cell table:style-name="ce137" office:value-type="string" calcext:value-type="string">
            <text:p>większe</text:p>
          </table:table-cell>
          <table:table-cell table:style-name="ce141" table:number-columns-repeated="2"/>
        </table:table-row>
        <table:table-row table:style-name="ro1">
          <table:table-cell table:style-name="ce11" office:value-type="string" calcext:value-type="string">
            <text:p>MF_02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known</text:p>
          </table:table-cell>
          <table:table-cell table:style-name="ce134" office:value-type="float" office:value="0.00526654016487757" calcext:value-type="float">
            <text:p>0,00526654016487757</text:p>
          </table:table-cell>
          <table:table-cell table:style-name="ce134" office:value-type="float" office:value="0.0204733968104237" calcext:value-type="float">
            <text:p>0,0204733968104237</text:p>
          </table:table-cell>
          <table:table-cell table:style-name="ce136" office:value-type="string" calcext:value-type="string">
            <text:p>większe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MF_0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00000107233524746106" calcext:value-type="float">
            <text:p>1,07233524746106E-07</text:p>
          </table:table-cell>
          <table:table-cell office:value-type="float" office:value="0.00000103659073921236" calcext:value-type="float">
            <text:p>1,03659073921236E-06</text:p>
          </table:table-cell>
          <table:table-cell table:style-name="ce138"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52896168757108" calcext:value-type="float">
            <text:p>0,52896168757108</text:p>
          </table:table-cell>
          <table:table-cell office:value-type="float" office:value="0.651046853363051" calcext:value-type="float">
            <text:p>0,651046853363051</text:p>
          </table:table-cell>
          <table:table-cell table:style-name="ce139" office:value-type="string" calcext:value-type="string" table:number-columns-spanned="2" table:number-rows-spanned="1">
            <text:p>równe chainsaw wyższy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841602189323763" calcext:value-type="float">
            <text:p>0,0841602189323763</text:p>
          </table:table-cell>
          <table:table-cell office:value-type="float" office:value="0.174331882074208" calcext:value-type="float">
            <text:p>0,174331882074208</text:p>
          </table:table-cell>
          <table:table-cell table:style-name="ce138"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0056478336028755" calcext:value-type="float">
            <text:p>0,0056478336028755</text:p>
          </table:table-cell>
          <table:table-cell office:value-type="float" office:value="0.0204733968104237" calcext:value-type="float">
            <text:p>0,0204733968104237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176002171018805" calcext:value-type="float">
            <text:p>0,0176002171018805</text:p>
          </table:table-cell>
          <table:table-cell office:value-type="float" office:value="0.0510406295954535" calcext:value-type="float">
            <text:p>0,0510406295954535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table:number-columns-repeated="2" office:value-type="float" office:value="0.801911206137059" calcext:value-type="float">
            <text:p>0,801911206137059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0447322429917215" calcext:value-type="float">
            <text:p>0,00447322429917215</text:p>
          </table:table-cell>
          <table:table-cell office:value-type="float" office:value="0.0204733968104237" calcext:value-type="float">
            <text:p>0,0204733968104237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0103759313981572" calcext:value-type="float">
            <text:p>0,0103759313981572</text:p>
          </table:table-cell>
          <table:table-cell office:value-type="float" office:value="0.0334335567273955" calcext:value-type="float">
            <text:p>0,0334335567273955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538797395886663" calcext:value-type="float">
            <text:p>0,538797395886663</text:p>
          </table:table-cell>
          <table:table-cell office:value-type="float" office:value="0.651046853363051" calcext:value-type="float">
            <text:p>0,651046853363051</text:p>
          </table:table-cell>
          <table:table-cell table:style-name="ce139" office:value-type="string" calcext:value-type="string" table:number-columns-spanned="2" table:number-rows-spanned="1">
            <text:p>równe chainsaw wyższy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524255793230479" calcext:value-type="float">
            <text:p>0,524255793230479</text:p>
          </table:table-cell>
          <table:table-cell office:value-type="float" office:value="0.651046853363051" calcext:value-type="float">
            <text:p>0,651046853363051</text:p>
          </table:table-cell>
          <table:table-cell table:style-name="ce138"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F_ic_05</text:p>
          </table:table-cell>
          <table:table-cell table:style-name="ce13" office:value-type="string" calcext:value-type="string">
            <text:p>count</text:p>
          </table:table-cell>
          <table:table-cell table:style-name="ce13" office:value-type="string" calcext:value-type="string">
            <text:p>unknown</text:p>
          </table:table-cell>
          <table:table-cell table:style-name="ce135" office:value-type="float" office:value="0.103242888622703" calcext:value-type="float">
            <text:p>0,103242888622703</text:p>
          </table:table-cell>
          <table:table-cell table:style-name="ce135" office:value-type="float" office:value="0.198700542430847" calcext:value-type="float">
            <text:p>0,198700542430847</text:p>
          </table:table-cell>
          <table:table-cell table:style-name="ce137"/>
          <table:table-cell table:style-name="ce137"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F_02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known</text:p>
          </table:table-cell>
          <table:table-cell table:style-name="ce134" office:value-type="float" office:value="0.109627885479088" calcext:value-type="float">
            <text:p>0,109627885479088</text:p>
          </table:table-cell>
          <table:table-cell table:style-name="ce134" office:value-type="float" office:value="0.198700542430847" calcext:value-type="float">
            <text:p>0,198700542430847</text:p>
          </table:table-cell>
          <table:table-cell table:style-name="ce136" office:value-type="string" calcext:value-type="string">
            <text:p>większe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MF_0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nknown</text:p>
          </table:table-cell>
          <table:table-cell office:value-type="float" office:value="0.0349159388559096" calcext:value-type="float">
            <text:p>0,0349159388559096</text:p>
          </table:table-cell>
          <table:table-cell office:value-type="float" office:value="0.0778894020631829" calcext:value-type="float">
            <text:p>0,0778894020631829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known</text:p>
          </table:table-cell>
          <table:table-cell office:value-type="float" office:value="0.292267628906042" calcext:value-type="float">
            <text:p>0,292267628906042</text:p>
          </table:table-cell>
          <table:table-cell office:value-type="float" office:value="0.423788061913761" calcext:value-type="float">
            <text:p>0,423788061913761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nknown</text:p>
          </table:table-cell>
          <table:table-cell office:value-type="float" office:value="0.603778065410866" calcext:value-type="float">
            <text:p>0,603778065410866</text:p>
          </table:table-cell>
          <table:table-cell office:value-type="float" office:value="0.673444765265966" calcext:value-type="float">
            <text:p>0,673444765265966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known</text:p>
          </table:table-cell>
          <table:table-cell office:value-type="float" office:value="0.00106707064593974" calcext:value-type="float">
            <text:p>0,00106707064593974</text:p>
          </table:table-cell>
          <table:table-cell office:value-type="float" office:value="0.00618900974645049" calcext:value-type="float">
            <text:p>0,00618900974645049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nknown</text:p>
          </table:table-cell>
          <table:table-cell office:value-type="float" office:value="0.60079119720028" calcext:value-type="float">
            <text:p>0,60079119720028</text:p>
          </table:table-cell>
          <table:table-cell office:value-type="float" office:value="0.673444765265966" calcext:value-type="float">
            <text:p>0,673444765265966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known</text:p>
          </table:table-cell>
          <table:table-cell office:value-type="float" office:value="0.262362352985314" calcext:value-type="float">
            <text:p>0,262362352985314</text:p>
          </table:table-cell>
          <table:table-cell office:value-type="float" office:value="0.400447801924954" calcext:value-type="float">
            <text:p>0,400447801924954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nknown</text:p>
          </table:table-cell>
          <table:table-cell office:value-type="float" office:value="0.201788517055292" calcext:value-type="float">
            <text:p>0,201788517055292</text:p>
          </table:table-cell>
          <table:table-cell office:value-type="float" office:value="0.344227470270792" calcext:value-type="float">
            <text:p>0,344227470270792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known</text:p>
          </table:table-cell>
          <table:table-cell office:value-type="float" office:value="0.000184539704844603" calcext:value-type="float">
            <text:p>0,000184539704844603</text:p>
          </table:table-cell>
          <table:table-cell office:value-type="float" office:value="0.00133791286012337" calcext:value-type="float">
            <text:p>0,00133791286012337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nknown</text:p>
          </table:table-cell>
          <table:table-cell office:value-type="float" office:value="0.745002906350085" calcext:value-type="float">
            <text:p>0,745002906350085</text:p>
          </table:table-cell>
          <table:table-cell office:value-type="float" office:value="0.771610153005445" calcext:value-type="float">
            <text:p>0,771610153005445</text:p>
          </table:table-cell>
          <table:table-cell/>
          <table:table-cell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known</text:p>
          </table:table-cell>
          <table:table-cell office:value-type="float" office:value="0.704574402735028" calcext:value-type="float">
            <text:p>0,704574402735028</text:p>
          </table:table-cell>
          <table:table-cell office:value-type="float" office:value="0.756765099233919" calcext:value-type="float">
            <text:p>0,756765099233919</text:p>
          </table:table-cell>
          <table:table-cell office:value-type="string" calcext:value-type="string">
            <text:p>większ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F_ic_05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unknown</text:p>
          </table:table-cell>
          <table:table-cell table:style-name="ce135" office:value-type="float" office:value="0.227944388551933" calcext:value-type="float">
            <text:p>0,227944388551933</text:p>
          </table:table-cell>
          <table:table-cell table:style-name="ce135" office:value-type="float" office:value="0.367243737111447" calcext:value-type="float">
            <text:p>0,367243737111447</text:p>
          </table:table-cell>
          <table:table-cell table:style-name="ce137" office:value-type="string" calcext:value-type="string">
            <text:p>większe</text:p>
          </table:table-cell>
          <table:table-cell table:style-name="ce137"/>
          <table:table-cell table:number-columns-repeated="2"/>
        </table:table-row>
        <table:table-row table:style-name="ro1">
          <table:table-cell table:style-name="ce11" office:value-type="string" calcext:value-type="string">
            <text:p>MF_median_ic</text:p>
          </table:table-cell>
          <table:table-cell table:style-name="ce11" office:value-type="string" calcext:value-type="string">
            <text:p>median_ic_comparison</text:p>
          </table:table-cell>
          <table:table-cell table:style-name="ce11" office:value-type="string" calcext:value-type="string">
            <text:p>known</text:p>
          </table:table-cell>
          <table:table-cell table:style-name="ce134" office:value-type="float" office:value="0.034139899118539" calcext:value-type="float">
            <text:p>0,034139899118539</text:p>
          </table:table-cell>
          <table:table-cell table:style-name="ce134" office:value-type="float" office:value="0.0778894020631829" calcext:value-type="float">
            <text:p>0,0778894020631829</text:p>
          </table:table-cell>
          <table:table-cell table:style-name="ce136"/>
          <table:table-cell table:style-name="ce136" office:value-type="string" calcext:value-type="string">
            <text:p>większ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F_median_ic</text:p>
          </table:table-cell>
          <table:table-cell table:style-name="ce13" office:value-type="string" calcext:value-type="string">
            <text:p>median_ic_comparison</text:p>
          </table:table-cell>
          <table:table-cell table:style-name="ce13" office:value-type="string" calcext:value-type="string">
            <text:p>unknown</text:p>
          </table:table-cell>
          <table:table-cell table:style-name="ce135" office:value-type="float" office:value="0.448987464090898" calcext:value-type="float">
            <text:p>0,448987464090898</text:p>
          </table:table-cell>
          <table:table-cell table:style-name="ce135" office:value-type="float" office:value="0.620030307554097" calcext:value-type="float">
            <text:p>0,620030307554097</text:p>
          </table:table-cell>
          <table:table-cell table:style-name="ce137"/>
          <table:table-cell table:style-name="ce137" office:value-type="string" calcext:value-type="string">
            <text:p>większe</text:p>
          </table:table-cell>
          <table:table-cell table:number-columns-repeated="2"/>
        </table:table-row>
        <calcext:conditional-formats>
          <calcext:conditional-format calcext:target-range-address="summary_v2.D2:summary_v2.E30">
            <calcext:condition calcext:apply-style-name="Good" calcext:value="&lt;0.05" calcext:base-cell-address="summary_v2.D2"/>
          </calcext:conditional-format>
        </calcext:conditional-formats>
      </table:table>
      <table:table table:name="summary_v3" table:style-name="ta1">
        <table:table-column table:style-name="co15" table:default-cell-style-name="ce12"/>
        <table:table-column table:style-name="co16" table:default-cell-style-name="ce117"/>
        <table:table-column table:style-name="co3" table:default-cell-style-name="ce12"/>
        <table:table-column table:style-name="co3" table:number-columns-repeated="2" table:default-cell-style-name="ce151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15" office:value-type="string" calcext:value-type="string">
            <text:p>stats</text:p>
          </table:table-cell>
          <table:table-cell table:style-name="ce1" office:value-type="string" calcext:value-type="string">
            <text:p>data_type</text:p>
          </table:table-cell>
          <table:table-cell table:style-name="ce149" office:value-type="string" calcext:value-type="string">
            <text:p>pvalue</text:p>
          </table:table-cell>
          <table:table-cell table:style-name="ce149" office:value-type="string" calcext:value-type="string">
            <text:p>pvalue_bh</text:p>
          </table:table-cell>
        </table:table-row>
        <table:table-row table:style-name="ro1">
          <table:table-cell table:style-name="ce11" office:value-type="string" calcext:value-type="string">
            <text:p>lengths</text:p>
          </table:table-cell>
          <table:table-cell table:style-name="ce116" office:value-type="string" calcext:value-type="string">
            <text:p>percent_overlap_chainsaw</text:p>
          </table:table-cell>
          <table:table-cell table:style-name="ce11" office:value-type="string" calcext:value-type="string">
            <text:p>difference</text:p>
          </table:table-cell>
          <table:table-cell table:number-columns-repeated="2" table:style-name="ce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th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known</text:p>
          </table:table-cell>
          <table:table-cell office:value-type="float" office:value="1.20743000975256E-281" calcext:value-type="float">
            <text:p>1,20743000975256E-281</text:p>
          </table:table-cell>
          <table:table-cell office:value-type="float" office:value="1.75077351414122E-280" calcext:value-type="float">
            <text:p>1,75077351414122E-280</text:p>
          </table:table-cell>
        </table:table-row>
        <table:table-row table:style-name="ro1">
          <table:table-cell table:style-name="ce13" office:value-type="string" calcext:value-type="string">
            <text:p>lengths</text:p>
          </table:table-cell>
          <table:table-cell table:style-name="ce118" office:value-type="string" calcext:value-type="string">
            <text:p>length</text:p>
          </table:table-cell>
          <table:table-cell table:style-name="ce13" office:value-type="string" calcext:value-type="string">
            <text:p>unknown</text:p>
          </table:table-cell>
          <table:table-cell table:style-name="ce152" office:value-type="float" office:value="0.0203834246364386" calcext:value-type="float">
            <text:p>0,0203834246364386</text:p>
          </table:table-cell>
          <table:table-cell table:style-name="ce152" office:value-type="float" office:value="0.0440797603690466" calcext:value-type="float">
            <text:p>0,0440797603690466</text:p>
          </table:table-cell>
        </table:table-row>
        <table:table-row table:style-name="ro1">
          <table:table-cell table:style-name="ce11" office:value-type="string" calcext:value-type="string">
            <text:p>MF_02</text:p>
          </table:table-cell>
          <table:table-cell table:style-name="ce116" office:value-type="string" calcext:value-type="string">
            <text:p>count</text:p>
          </table:table-cell>
          <table:table-cell table:style-name="ce11" office:value-type="string" calcext:value-type="string">
            <text:p>known</text:p>
          </table:table-cell>
          <table:table-cell table:number-columns-repeated="2" table:style-name="ce150" office:value-type="float" office:value="0.762368562400584" calcext:value-type="float">
            <text:p>0,762368562400584</text:p>
          </table:table-cell>
        </table:table-row>
        <table:table-row table:style-name="ro1">
          <table:table-cell office:value-type="string" calcext:value-type="string">
            <text:p>MF_0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397843390579712" calcext:value-type="float">
            <text:p>0,397843390579712</text:p>
          </table:table-cell>
          <table:table-cell office:value-type="float" office:value="0.427313271363394" calcext:value-type="float">
            <text:p>0,427313271363394</text:p>
          </table:table-cell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216820171935047" calcext:value-type="float">
            <text:p>0,216820171935047</text:p>
          </table:table-cell>
          <table:table-cell office:value-type="float" office:value="0.285808408459834" calcext:value-type="float">
            <text:p>0,285808408459834</text:p>
          </table:table-cell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117088643376741" calcext:value-type="float">
            <text:p>0,117088643376741</text:p>
          </table:table-cell>
          <table:table-cell office:value-type="float" office:value="0.169778532896275" calcext:value-type="float">
            <text:p>0,169778532896275</text:p>
          </table:table-cell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228022184967175" calcext:value-type="float">
            <text:p>0,228022184967175</text:p>
          </table:table-cell>
          <table:table-cell office:value-type="float" office:value="0.287506233219482" calcext:value-type="float">
            <text:p>0,287506233219482</text:p>
          </table:table-cell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0103216454130091" calcext:value-type="float">
            <text:p>0,00103216454130091</text:p>
          </table:table-cell>
          <table:table-cell office:value-type="float" office:value="0.00332586352196961" calcext:value-type="float">
            <text:p>0,00332586352196961</text:p>
          </table:table-cell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368261902843266" calcext:value-type="float">
            <text:p>0,368261902843266</text:p>
          </table:table-cell>
          <table:table-cell office:value-type="float" office:value="0.421804923816524" calcext:value-type="float">
            <text:p>0,421804923816524</text:p>
          </table:table-cell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0445806193682122" calcext:value-type="float">
            <text:p>0,00445806193682122</text:p>
          </table:table-cell>
          <table:table-cell office:value-type="float" office:value="0.0117530723788923" calcext:value-type="float">
            <text:p>0,0117530723788923</text:p>
          </table:table-cell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027498541249836" calcext:value-type="float">
            <text:p>0,027498541249836</text:p>
          </table:table-cell>
          <table:table-cell office:value-type="float" office:value="0.0498411060153278" calcext:value-type="float">
            <text:p>0,0498411060153278</text:p>
          </table:table-cell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38581890231262" calcext:value-type="float">
            <text:p>0,038581890231262</text:p>
          </table:table-cell>
          <table:table-cell office:value-type="float" office:value="0.0658161656886234" calcext:value-type="float">
            <text:p>0,0658161656886234</text:p>
          </table:table-cell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nown</text:p>
          </table:table-cell>
          <table:table-cell office:value-type="float" office:value="0.130330388580776" calcext:value-type="float">
            <text:p>0,130330388580776</text:p>
          </table:table-cell>
          <table:table-cell office:value-type="float" office:value="0.179980060421071" calcext:value-type="float">
            <text:p>0,179980060421071</text:p>
          </table:table-cell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  <table:table-cell office:value-type="float" office:value="0.000444515821944389" calcext:value-type="float">
            <text:p>0,000444515821944389</text:p>
          </table:table-cell>
          <table:table-cell office:value-type="float" office:value="0.00161136985454841" calcext:value-type="float">
            <text:p>0,00161136985454841</text:p>
          </table:table-cell>
        </table:table-row>
        <table:table-row table:style-name="ro1">
          <table:table-cell table:style-name="ce11" office:value-type="string" calcext:value-type="string">
            <text:p>MF_02</text:p>
          </table:table-cell>
          <table:table-cell table:style-name="ce116" office:value-type="string" calcext:value-type="string">
            <text:p>median_score</text:p>
          </table:table-cell>
          <table:table-cell table:style-name="ce11" office:value-type="string" calcext:value-type="string">
            <text:p>known</text:p>
          </table:table-cell>
          <table:table-cell table:style-name="ce153" office:value-type="float" office:value="0.0000702230630672538" calcext:value-type="float">
            <text:p>7,02230630672538E-05</text:p>
          </table:table-cell>
          <table:table-cell table:style-name="ce153" office:value-type="float" office:value="0.00050911720723759" calcext:value-type="float">
            <text:p>0,00050911720723759</text:p>
          </table:table-cell>
        </table:table-row>
        <table:table-row table:style-name="ro1">
          <table:table-cell office:value-type="string" calcext:value-type="string">
            <text:p>MF_02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unknown</text:p>
          </table:table-cell>
          <table:table-cell table:style-name="ce154" office:value-type="float" office:value="0.0115124442189797" calcext:value-type="float">
            <text:p>0,0115124442189797</text:p>
          </table:table-cell>
          <table:table-cell table:style-name="ce154" office:value-type="float" office:value="0.0278217401958676" calcext:value-type="float">
            <text:p>0,0278217401958676</text:p>
          </table:table-cell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known</text:p>
          </table:table-cell>
          <table:table-cell table:style-name="ce154" office:value-type="float" office:value="0.0212798843160915" calcext:value-type="float">
            <text:p>0,0212798843160915</text:p>
          </table:table-cell>
          <table:table-cell table:style-name="ce154" office:value-type="float" office:value="0.0440797603690466" calcext:value-type="float">
            <text:p>0,0440797603690466</text:p>
          </table:table-cell>
        </table:table-row>
        <table:table-row table:style-name="ro1">
          <table:table-cell office:value-type="string" calcext:value-type="string">
            <text:p>MF_03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unknown</text:p>
          </table:table-cell>
          <table:table-cell table:style-name="ce154" office:value-type="float" office:value="0.057581045069523" calcext:value-type="float">
            <text:p>0,057581045069523</text:p>
          </table:table-cell>
          <table:table-cell table:style-name="ce154" office:value-type="float" office:value="0.0927694615008981" calcext:value-type="float">
            <text:p>0,0927694615008981</text:p>
          </table:table-cell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known</text:p>
          </table:table-cell>
          <table:table-cell table:style-name="ce154" office:value-type="float" office:value="0.449795742649574" calcext:value-type="float">
            <text:p>0,449795742649574</text:p>
          </table:table-cell>
          <table:table-cell table:style-name="ce154" office:value-type="float" office:value="0.46585987631563" calcext:value-type="float">
            <text:p>0,46585987631563</text:p>
          </table:table-cell>
        </table:table-row>
        <table:table-row table:style-name="ro1">
          <table:table-cell office:value-type="string" calcext:value-type="string">
            <text:p>MF_05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unknown</text:p>
          </table:table-cell>
          <table:table-cell table:style-name="ce154" office:value-type="float" office:value="0.374980444765897" calcext:value-type="float">
            <text:p>0,374980444765897</text:p>
          </table:table-cell>
          <table:table-cell table:style-name="ce154" office:value-type="float" office:value="0.421804923816524" calcext:value-type="float">
            <text:p>0,421804923816524</text:p>
          </table:table-cell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known</text:p>
          </table:table-cell>
          <table:table-cell table:style-name="ce154" office:value-type="float" office:value="0.000139731724067042" calcext:value-type="float">
            <text:p>0,000139731724067042</text:p>
          </table:table-cell>
          <table:table-cell table:style-name="ce154" office:value-type="float" office:value="0.000760971464702759" calcext:value-type="float">
            <text:p>0,000760971464702759</text:p>
          </table:table-cell>
        </table:table-row>
        <table:table-row table:style-name="ro1">
          <table:table-cell office:value-type="string" calcext:value-type="string">
            <text:p>MF_ic_02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unknown</text:p>
          </table:table-cell>
          <table:table-cell table:style-name="ce154" office:value-type="float" office:value="0.000157442372007467" calcext:value-type="float">
            <text:p>0,000157442372007467</text:p>
          </table:table-cell>
          <table:table-cell table:style-name="ce154" office:value-type="float" office:value="0.000760971464702759" calcext:value-type="float">
            <text:p>0,000760971464702759</text:p>
          </table:table-cell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known</text:p>
          </table:table-cell>
          <table:table-cell table:style-name="ce154" office:value-type="float" office:value="0.00236940467028491" calcext:value-type="float">
            <text:p>0,00236940467028491</text:p>
          </table:table-cell>
          <table:table-cell table:style-name="ce154" office:value-type="float" office:value="0.00687127354382624" calcext:value-type="float">
            <text:p>0,00687127354382624</text:p>
          </table:table-cell>
        </table:table-row>
        <table:table-row table:style-name="ro1">
          <table:table-cell office:value-type="string" calcext:value-type="string">
            <text:p>MF_ic_03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unknown</text:p>
          </table:table-cell>
          <table:table-cell table:style-name="ce154" office:value-type="float" office:value="0.0914103485776214" calcext:value-type="float">
            <text:p>0,0914103485776214</text:p>
          </table:table-cell>
          <table:table-cell table:style-name="ce154" office:value-type="float" office:value="0.139521058355317" calcext:value-type="float">
            <text:p>0,139521058355317</text:p>
          </table:table-cell>
        </table:table-row>
        <table:table-row table:style-name="ro1">
          <table:table-cell office:value-type="string" calcext:value-type="string">
            <text:p>MF_ic_05</text:p>
          </table:table-cell>
          <table:table-cell office:value-type="string" calcext:value-type="string">
            <text:p>median_score</text:p>
          </table:table-cell>
          <table:table-cell office:value-type="string" calcext:value-type="string">
            <text:p>known</text:p>
          </table:table-cell>
          <table:table-cell table:style-name="ce154" office:value-type="float" office:value="0.0234069998692775" calcext:value-type="float">
            <text:p>0,0234069998692775</text:p>
          </table:table-cell>
          <table:table-cell table:style-name="ce154" office:value-type="float" office:value="0.0452535330806032" calcext:value-type="float">
            <text:p>0,0452535330806032</text:p>
          </table:table-cell>
        </table:table-row>
        <table:table-row table:style-name="ro1">
          <table:table-cell table:style-name="ce13" office:value-type="string" calcext:value-type="string">
            <text:p>MF_ic_05</text:p>
          </table:table-cell>
          <table:table-cell table:style-name="ce118" office:value-type="string" calcext:value-type="string">
            <text:p>median_score</text:p>
          </table:table-cell>
          <table:table-cell table:style-name="ce13" office:value-type="string" calcext:value-type="string">
            <text:p>unknown</text:p>
          </table:table-cell>
          <table:table-cell table:style-name="ce152" office:value-type="float" office:value="0.378169931697573" calcext:value-type="float">
            <text:p>0,378169931697573</text:p>
          </table:table-cell>
          <table:table-cell table:style-name="ce152" office:value-type="float" office:value="0.421804923816524" calcext:value-type="float">
            <text:p>0,421804923816524</text:p>
          </table:table-cell>
        </table:table-row>
        <table:table-row table:style-name="ro1">
          <table:table-cell office:value-type="string" calcext:value-type="string">
            <text:p>MF_median_ic</text:p>
          </table:table-cell>
          <table:table-cell office:value-type="string" calcext:value-type="string">
            <text:p>median_ic_comparison</text:p>
          </table:table-cell>
          <table:table-cell office:value-type="string" calcext:value-type="string">
            <text:p>known</text:p>
          </table:table-cell>
          <table:table-cell office:value-type="float" office:value="3.23867032647957E-028" calcext:value-type="float">
            <text:p>3,23867032647957E-28</text:p>
          </table:table-cell>
          <table:table-cell office:value-type="float" office:value="3.13071464893025E-027" calcext:value-type="float">
            <text:p>3,13071464893025E-27</text:p>
          </table:table-cell>
        </table:table-row>
        <table:table-row table:style-name="ro1">
          <table:table-cell table:style-name="ce13" office:value-type="string" calcext:value-type="string">
            <text:p>MF_median_ic</text:p>
          </table:table-cell>
          <table:table-cell table:style-name="ce118" office:value-type="string" calcext:value-type="string">
            <text:p>median_ic_comparison</text:p>
          </table:table-cell>
          <table:table-cell table:style-name="ce13" office:value-type="string" calcext:value-type="string">
            <text:p>unknown</text:p>
          </table:table-cell>
          <table:table-cell table:style-name="ce152" office:value-type="float" office:value="0.000427442717970112" calcext:value-type="float">
            <text:p>0,000427442717970112</text:p>
          </table:table-cell>
          <table:table-cell table:style-name="ce152" office:value-type="float" office:value="0.00161136985454841" calcext:value-type="float">
            <text:p>0,00161136985454841</text:p>
          </table:table-cell>
        </table:table-row>
        <calcext:conditional-formats>
          <calcext:conditional-format calcext:target-range-address="summary_v3.D28:summary_v3.E30 summary_v3.D1:summary_v3.E16">
            <calcext:condition calcext:apply-style-name="Good" calcext:value="&lt;0.05" calcext:base-cell-address="summary_v3.D1"/>
          </calcext:conditional-format>
          <calcext:conditional-format calcext:target-range-address="summary_v3.D17:summary_v3.E27">
            <calcext:condition calcext:apply-style-name="Good" calcext:value="&lt;0.05" calcext:base-cell-address="summary_v3.D17"/>
          </calcext:conditional-format>
        </calcext:conditional-formats>
      </table:table>
      <table:table table:name="summary_v6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3" table:default-cell-style-name="ce161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data_type</text:p>
          </table:table-cell>
          <table:table-cell table:style-name="ce157" office:value-type="string" calcext:value-type="string">
            <text:p>pvalue</text:p>
          </table:table-cell>
        </table:table-row>
        <table:table-row table:style-name="ro1">
          <table:table-cell table:style-name="ce12" office:value-type="string" calcext:value-type="string">
            <text:p>lengths</text:p>
          </table:table-cell>
          <table:table-cell table:style-name="ce12" office:value-type="string" calcext:value-type="string">
            <text:p>percent_overlap_chainsaw</text:p>
          </table:table-cell>
          <table:table-cell table:style-name="ce12" office:value-type="string" calcext:value-type="string">
            <text:p>difference</text:p>
          </table:table-cell>
          <table:table-cell table:style-name="ce158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lengths</text:p>
          </table:table-cell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lengths</text:p>
          </table:table-cell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0174146047172368" calcext:value-type="float">
            <text:p>0,0174146047172368</text:p>
          </table:table-cell>
        </table:table-row>
        <table:table-row table:style-name="ro1">
          <table:table-cell table:style-name="ce11" office:value-type="string" calcext:value-type="string">
            <text:p>MF_02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known</text:p>
          </table:table-cell>
          <table:table-cell table:style-name="ce159" office:value-type="float" office:value="0.00000301336290861169" calcext:value-type="float">
            <text:p>3,01336290861169E-06</text:p>
          </table:table-cell>
        </table:table-row>
        <table:table-row table:style-name="ro1">
          <table:table-cell table:style-name="ce12" office:value-type="string" calcext:value-type="string">
            <text:p>MF_02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0192815085345081" calcext:value-type="float">
            <text:p>0,0192815085345081</text:p>
          </table:table-cell>
        </table:table-row>
        <table:table-row table:style-name="ro1">
          <table:table-cell table:style-name="ce12" office:value-type="string" calcext:value-type="string">
            <text:p>MF_03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0356825919991678" calcext:value-type="float">
            <text:p>0,00356825919991678</text:p>
          </table:table-cell>
        </table:table-row>
        <table:table-row table:style-name="ro1">
          <table:table-cell table:style-name="ce12" office:value-type="string" calcext:value-type="string">
            <text:p>MF_03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235147429682253" calcext:value-type="float">
            <text:p>0,235147429682253</text:p>
          </table:table-cell>
        </table:table-row>
        <table:table-row table:style-name="ro1">
          <table:table-cell table:style-name="ce12" office:value-type="string" calcext:value-type="string">
            <text:p>MF_05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00286227144084185" calcext:value-type="float">
            <text:p>0,000286227144084185</text:p>
          </table:table-cell>
        </table:table-row>
        <table:table-row table:style-name="ro1">
          <table:table-cell table:style-name="ce12" office:value-type="string" calcext:value-type="string">
            <text:p>MF_05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0615188720264033" calcext:value-type="float">
            <text:p>0,0615188720264033</text:p>
          </table:table-cell>
        </table:table-row>
        <table:table-row table:style-name="ro1">
          <table:table-cell table:style-name="ce12" office:value-type="string" calcext:value-type="string">
            <text:p>MF_ic_02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514643594940239" calcext:value-type="float">
            <text:p>0,0514643594940239</text:p>
          </table:table-cell>
        </table:table-row>
        <table:table-row table:style-name="ro1">
          <table:table-cell table:style-name="ce12" office:value-type="string" calcext:value-type="string">
            <text:p>MF_ic_02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0240075732225365" calcext:value-type="float">
            <text:p>0,0240075732225365</text:p>
          </table:table-cell>
        </table:table-row>
        <table:table-row table:style-name="ro1">
          <table:table-cell table:style-name="ce12" office:value-type="string" calcext:value-type="string">
            <text:p>MF_ic_03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192658132028324" calcext:value-type="float">
            <text:p>0,192658132028324</text:p>
          </table:table-cell>
        </table:table-row>
        <table:table-row table:style-name="ro1">
          <table:table-cell table:style-name="ce12" office:value-type="string" calcext:value-type="string">
            <text:p>MF_ic_03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202052223164796" calcext:value-type="float">
            <text:p>0,202052223164796</text:p>
          </table:table-cell>
        </table:table-row>
        <table:table-row table:style-name="ro1">
          <table:table-cell table:style-name="ce12" office:value-type="string" calcext:value-type="string">
            <text:p>MF_ic_05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13040277574873" calcext:value-type="float">
            <text:p>0,013040277574873</text:p>
          </table:table-cell>
        </table:table-row>
        <table:table-row table:style-name="ro1">
          <table:table-cell table:style-name="ce13" office:value-type="string" calcext:value-type="string">
            <text:p>MF_ic_05</text:p>
          </table:table-cell>
          <table:table-cell table:style-name="ce13" office:value-type="string" calcext:value-type="string">
            <text:p>count</text:p>
          </table:table-cell>
          <table:table-cell table:style-name="ce13" office:value-type="string" calcext:value-type="string">
            <text:p>unknown</text:p>
          </table:table-cell>
          <table:table-cell table:style-name="ce160" office:value-type="float" office:value="0.0215288882147156" calcext:value-type="float">
            <text:p>0,0215288882147156</text:p>
          </table:table-cell>
        </table:table-row>
        <table:table-row table:style-name="ro1">
          <table:table-cell table:style-name="ce11" office:value-type="string" calcext:value-type="string">
            <text:p>MF_02</text:p>
          </table:table-cell>
          <table:table-cell table:style-name="ce11" office:value-type="string" calcext:value-type="string">
            <text:p>median_score</text:p>
          </table:table-cell>
          <table:table-cell table:style-name="ce11" office:value-type="string" calcext:value-type="string">
            <text:p>known</text:p>
          </table:table-cell>
          <table:table-cell table:style-name="ce159" office:value-type="float" office:value="0.000000369321274163875" calcext:value-type="float">
            <text:p>3,69321274163875E-07</text:p>
          </table:table-cell>
        </table:table-row>
        <table:table-row table:style-name="ro1">
          <table:table-cell table:style-name="ce12" office:value-type="string" calcext:value-type="string">
            <text:p>MF_02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651602317114267" calcext:value-type="float">
            <text:p>0,651602317114267</text:p>
          </table:table-cell>
        </table:table-row>
        <table:table-row table:style-name="ro1">
          <table:table-cell table:style-name="ce12" office:value-type="string" calcext:value-type="string">
            <text:p>MF_03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0116012951856577" calcext:value-type="float">
            <text:p>0,00116012951856577</text:p>
          </table:table-cell>
        </table:table-row>
        <table:table-row table:style-name="ro1">
          <table:table-cell table:style-name="ce12" office:value-type="string" calcext:value-type="string">
            <text:p>MF_03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786929855108008" calcext:value-type="float">
            <text:p>0,786929855108008</text:p>
          </table:table-cell>
        </table:table-row>
        <table:table-row table:style-name="ro1">
          <table:table-cell table:style-name="ce12" office:value-type="string" calcext:value-type="string">
            <text:p>MF_05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274550245500267" calcext:value-type="float">
            <text:p>0,0274550245500267</text:p>
          </table:table-cell>
        </table:table-row>
        <table:table-row table:style-name="ro1">
          <table:table-cell table:style-name="ce12" office:value-type="string" calcext:value-type="string">
            <text:p>MF_05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8293589116096" calcext:value-type="float">
            <text:p>0,8293589116096</text:p>
          </table:table-cell>
        </table:table-row>
        <table:table-row table:style-name="ro1">
          <table:table-cell table:style-name="ce12" office:value-type="string" calcext:value-type="string">
            <text:p>MF_ic_02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000165678195777179" calcext:value-type="float">
            <text:p>1,65678195777179E-05</text:p>
          </table:table-cell>
        </table:table-row>
        <table:table-row table:style-name="ro1">
          <table:table-cell table:style-name="ce12" office:value-type="string" calcext:value-type="string">
            <text:p>MF_ic_02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421665870613009" calcext:value-type="float">
            <text:p>0,421665870613009</text:p>
          </table:table-cell>
        </table:table-row>
        <table:table-row table:style-name="ro1">
          <table:table-cell table:style-name="ce12" office:value-type="string" calcext:value-type="string">
            <text:p>MF_ic_03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00718119777596935" calcext:value-type="float">
            <text:p>0,000718119777596935</text:p>
          </table:table-cell>
        </table:table-row>
        <table:table-row table:style-name="ro1">
          <table:table-cell table:style-name="ce12" office:value-type="string" calcext:value-type="string">
            <text:p>MF_ic_03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unknown</text:p>
          </table:table-cell>
          <table:table-cell table:style-name="ce158" office:value-type="float" office:value="0.41414043643486" calcext:value-type="float">
            <text:p>0,41414043643486</text:p>
          </table:table-cell>
        </table:table-row>
        <table:table-row table:style-name="ro1">
          <table:table-cell table:style-name="ce12" office:value-type="string" calcext:value-type="string">
            <text:p>MF_ic_05</text:p>
          </table:table-cell>
          <table:table-cell table:style-name="ce12" office:value-type="string" calcext:value-type="string">
            <text:p>median_score</text:p>
          </table:table-cell>
          <table:table-cell table:style-name="ce12" office:value-type="string" calcext:value-type="string">
            <text:p>known</text:p>
          </table:table-cell>
          <table:table-cell table:style-name="ce158" office:value-type="float" office:value="0.00148234215719006" calcext:value-type="float">
            <text:p>0,00148234215719006</text:p>
          </table:table-cell>
        </table:table-row>
        <table:table-row table:style-name="ro1">
          <table:table-cell table:style-name="ce13" office:value-type="string" calcext:value-type="string">
            <text:p>MF_ic_05</text:p>
          </table:table-cell>
          <table:table-cell table:style-name="ce13" office:value-type="string" calcext:value-type="string">
            <text:p>median_score</text:p>
          </table:table-cell>
          <table:table-cell table:style-name="ce13" office:value-type="string" calcext:value-type="string">
            <text:p>unknown</text:p>
          </table:table-cell>
          <table:table-cell table:style-name="ce160" office:value-type="float" office:value="0.114370796566833" calcext:value-type="float">
            <text:p>0,114370796566833</text:p>
          </table:table-cell>
        </table:table-row>
        <table:table-row table:style-name="ro1">
          <table:table-cell table:style-name="ce11" office:value-type="string" calcext:value-type="string">
            <text:p>MF_median_ic</text:p>
          </table:table-cell>
          <table:table-cell table:style-name="ce11" office:value-type="string" calcext:value-type="string">
            <text:p>median_ic_comparison</text:p>
          </table:table-cell>
          <table:table-cell table:style-name="ce11" office:value-type="string" calcext:value-type="string">
            <text:p>known</text:p>
          </table:table-cell>
          <table:table-cell table:style-name="ce159" office:value-type="float" office:value="1.84025801033218E-022" calcext:value-type="float">
            <text:p>1,84025801033218E-22</text:p>
          </table:table-cell>
        </table:table-row>
        <table:table-row table:style-name="ro1">
          <table:table-cell table:style-name="ce13" office:value-type="string" calcext:value-type="string">
            <text:p>MF_median_ic</text:p>
          </table:table-cell>
          <table:table-cell table:style-name="ce13" office:value-type="string" calcext:value-type="string">
            <text:p>median_ic_comparison</text:p>
          </table:table-cell>
          <table:table-cell table:style-name="ce13" office:value-type="string" calcext:value-type="string">
            <text:p>unknown</text:p>
          </table:table-cell>
          <table:table-cell table:style-name="ce160" office:value-type="float" office:value="0.0000143749972077086" calcext:value-type="float">
            <text:p>1,43749972077086E-05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ummary_v6.D2:summary_v6.D30">
            <calcext:condition calcext:apply-style-name="Good" calcext:value="&lt;0.05" calcext:base-cell-address="summary_v6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a1887f" fo:wrap-option="no-wrap" style:shrink-to-fit="false"/>
      <style:text-properties fo:color="#000000" fo:font-weight="normal" style:font-weight-asian="normal"/>
    </style:style>
    <style:style style:name="Accent_20_2" style:display-name="Accent 2" style:family="table-cell" style:parent-style-name="Accent">
      <style:table-cell-properties fo:background-color="#bcaaa4" fo:wrap-option="no-wrap" style:shrink-to-fit="false"/>
      <style:text-properties fo:color="#000000" fo:font-weight="normal" style:font-weight-asian="normal"/>
    </style:style>
    <style:style style:name="Accent_20_3" style:display-name="Accent 3" style:family="table-cell" style:parent-style-name="Accent">
      <style:table-cell-properties fo:background-color="#efebe9" fo:wrap-option="no-wrap" style:shrink-to-fit="false"/>
      <style:text-properties fo:font-weight="normal" style:font-weight-asian="norm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.00.0000</text:date>, <text:time style:data-style-name="N2" text:time-value="14:05:49.19643012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22T14:09:26.620261547</dc:date>
    <meta:editing-duration>P1DT8H16M39S</meta:editing-duration>
    <meta:editing-cycles>13</meta:editing-cycles>
    <meta:generator>LibreOffice/26.2.3.2$Linux_X86_64 LibreOffice_project/d4d5ed47b6084125f28d269a5650105d54dde034</meta:generator>
    <meta:document-statistic meta:table-count="8" meta:cell-count="3061" meta:object-count="0"/>
  </office:meta>
</office:document-meta>
</file>